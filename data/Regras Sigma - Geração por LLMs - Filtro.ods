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345.15pt"/>
    </style:style>
    <style:style style:name="co3" style:family="table-column">
      <style:table-column-properties fo:break-before="auto" style:column-width="52.1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22.96pt"/>
    </style:style>
    <style:style style:name="co6" style:family="table-column">
      <style:table-column-properties fo:break-before="auto" style:column-width="59.05pt"/>
    </style:style>
    <style:style style:name="co7" style:family="table-column">
      <style:table-column-properties fo:break-before="auto" style:column-width="215.29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370.86pt"/>
    </style:style>
    <style:style style:name="co10" style:family="table-column">
      <style:table-column-properties fo:break-before="auto" style:column-width="36.79pt"/>
    </style:style>
    <style:style style:name="co11" style:family="table-column">
      <style:table-column-properties fo:break-before="auto" style:column-width="20.15pt"/>
    </style:style>
    <style:style style:name="co12" style:family="table-column">
      <style:table-column-properties fo:break-before="auto" style:column-width="19.45pt"/>
    </style:style>
    <style:style style:name="co13" style:family="table-column">
      <style:table-column-properties fo:break-before="auto" style:column-width="22.2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21.54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Gabarito">
      <style:table-properties table:display="true" style:writing-mode="lr-tb"/>
    </style:style>
    <style:style style:name="ta2" style:family="table" style:master-page-name="PageStyle_5f_Resultados">
      <style:table-properties table:display="true" style:writing-mode="lr-tb"/>
    </style:style>
    <style:style style:name="ta3" style:family="table" style:master-page-name="PageStyle_5f_Prompt1">
      <style:table-properties table:display="true" style:writing-mode="lr-tb"/>
    </style:style>
    <style:style style:name="ta4" style:family="table" style:master-page-name="PageStyle_5f_Prompt2">
      <style:table-properties table:display="true" style:writing-mode="lr-tb"/>
    </style:style>
    <style:style style:name="ta5" style:family="table" style:master-page-name="PageStyle_5f_Regras_20_filtrada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1c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1c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1c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1c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1c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9cb9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c9daf8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bari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table:style-name="ce1"/>
          <table:table-cell table:style-name="ce6" office:value-type="string" calcext:value-type="string">
            <text:p>Nome original</text:p>
          </table:table-cell>
          <table:table-cell table:style-name="ce11" office:value-type="string" calcext:value-type="string" table:number-columns-spanned="5" table:number-rows-spanned="1">
            <text:p>Stage 1</text:p>
          </table:table-cell>
          <table:covered-table-cell table:number-columns-repeated="4"/>
          <table:table-cell table:style-name="ce16"/>
          <table:table-cell table:style-name="ce20" office:value-type="string" calcext:value-type="string" table:number-columns-spanned="5" table:number-rows-spanned="1">
            <text:p>Stage 2</text:p>
          </table:table-cell>
          <table:covered-table-cell table:number-columns-repeated="4"/>
          <table:table-cell table:style-name="ce1" office:value-type="string" calcext:value-type="string">
            <text:p>Stage 3</text:p>
          </table:table-cell>
          <table:table-cell table:style-name="ce26" table:number-columns-repeated="16"/>
          <table:table-cell table:number-columns-repeated="994"/>
        </table:table-row>
        <table:table-row table:style-name="ro2">
          <table:table-cell table:style-name="ce2"/>
          <table:table-cell table:style-name="ce7"/>
          <table:table-cell table:style-name="ce12" office:value-type="string" calcext:value-type="string">
            <text:p>CHATGPT</text:p>
          </table:table-cell>
          <table:table-cell table:style-name="ce12" office:value-type="string" calcext:value-type="string">
            <text:p>CLAUDE</text:p>
          </table:table-cell>
          <table:table-cell table:style-name="ce12" office:value-type="string" calcext:value-type="string">
            <text:p>COPILOT</text:p>
          </table:table-cell>
          <table:table-cell table:style-name="ce12" office:value-type="string" calcext:value-type="string">
            <text:p>DEEPSEEK</text:p>
          </table:table-cell>
          <table:table-cell table:style-name="ce12" office:value-type="string" calcext:value-type="string">
            <text:p>GEMINI</text:p>
          </table:table-cell>
          <table:table-cell table:style-name="ce17"/>
          <table:table-cell table:style-name="ce21" office:value-type="string" calcext:value-type="string">
            <text:p>CHATGPT</text:p>
          </table:table-cell>
          <table:table-cell table:style-name="ce21" office:value-type="string" calcext:value-type="string">
            <text:p>CLAUDE</text:p>
          </table:table-cell>
          <table:table-cell table:style-name="ce21" office:value-type="string" calcext:value-type="string">
            <text:p>COPILOT</text:p>
          </table:table-cell>
          <table:table-cell table:style-name="ce21" office:value-type="string" calcext:value-type="string">
            <text:p>DEEPSEEK</text:p>
          </table:table-cell>
          <table:table-cell table:style-name="ce21" office:value-type="string" calcext:value-type="string">
            <text:p>GEMINI</text:p>
          </table:table-cell>
          <table:table-cell table:style-name="ce2"/>
          <table:table-cell table:style-name="ce27" table:number-columns-repeated="16"/>
          <table:table-cell table:number-columns-repeated="99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itbucket_audit_unauthorized_full_data_export_triggered</text:p>
          </table:table-cell>
          <table:table-cell table:style-name="ce13" office:value-type="string" calcext:value-type="string">
            <text:p>C 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E</text:p>
          </table:table-cell>
          <table:table-cell table:style-name="ce18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 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E</text:p>
          </table:table-cell>
          <table:table-cell table:style-name="ce24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azure_app_device_code_authentication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C</text:p>
          </table:table-cell>
          <table:table-cell table:style-name="ce19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C 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D</text:p>
          </table:table-cell>
          <table:table-cell table:style-name="ce25"/>
          <table:table-cell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zeek_susp_kerberos_rc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 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 </text:p>
          </table:table-cell>
          <table:table-cell table:style-name="ce19" office:value-type="string" calcext:value-type="string">
            <text:p>C</text:p>
          </table:table-cell>
          <table:table-cell table:style-name="ce24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posh_ps_modify_group_policy_settings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9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B</text:p>
          </table:table-cell>
          <table:table-cell table:style-name="ce25"/>
          <table:table-cell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win_firewall_as_add_rule_wmiprvse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 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24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huawei_bgp_auth_failed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C 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E</text:p>
          </table:table-cell>
          <table:table-cell table:style-name="ce19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C</text:p>
          </table:table-cell>
          <table:table-cell table:style-name="ce25"/>
          <table:table-cell table:number-columns-repeated="101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rpc_firewall_printing_lateral_movement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 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24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registry_set_change_security_zones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9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5"/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app_sqlinjection_errors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E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db_anomalous_query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9"/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5"/>
          <table:table-cell table:style-name="ce29" table:number-columns-repeated="16"/>
          <table:table-cell table:number-columns-repeated="99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file_delete_win_delete_exchange_powershell_logs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net_dns_katz_stealer_domain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C 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E</text:p>
          </table:table-cell>
          <table:table-cell table:style-name="ce19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B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opencanary_ssh_login_attempt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E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proxy_exploit_cve_2023_1389_unauth_command_injection_tplink_archer_ax21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E</text:p>
          </table:table-cell>
          <table:table-cell table:style-name="ce19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registry_event_runkey_winekey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E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appframework_django_exceptions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D</text:p>
          </table:table-cell>
          <table:table-cell table:style-name="ce19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D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github_delete_action_invoked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java_local_file_read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9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kubernetes_audit_exec_into_container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A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kubernetes_audit_secrets_modified_or_delete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9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av_exploit_cve_2021_34527_print_nightmare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microsoft365_new_federated_domain_added_audit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B</text:p>
          </table:table-cell>
          <table:table-cell table:style-name="ce19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E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win_appxdeployment_server_appx_downloaded_from_file_sharing_domains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file_event_lnx_doas_conf_creation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9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posh_pm_invoke_obfuscation_stdin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win_security_exploit_cve_2023_36884_office_windows_html_rce_share_access_patter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9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appframework_ruby_on_rails_exceptions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E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pipe_created_sysinternals_psexec_default_pipe_susp_location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C</text:p>
          </table:table-cell>
          <table:table-cell table:style-name="ce19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C 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D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file_event_win_susp_startup_folder_persistence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 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 </text:p>
          </table:table-cell>
          <table:table-cell table:style-name="ce19" office:value-type="string" calcext:value-type="string">
            <text:p>C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proc_creation_macos_remote_access_tools_meshagent_arguments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9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create_remote_thread_win_powershell_generic.yml</text:p>
          </table:table-cell>
          <table:table-cell table:style-name="ce13" office:value-type="string" calcext:value-type="string">
            <text:p>C 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E</text:p>
          </table:table-cell>
          <table:table-cell table:style-name="ce18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 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E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image_load_susp_clickonce_unsigned_module_loaded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D</text:p>
          </table:table-cell>
          <table:table-cell table:style-name="ce19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D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web_sql_injection_in_access_logs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proc_creation_lnx_mal_shai_hulud_indicator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C 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E</text:p>
          </table:table-cell>
          <table:table-cell table:style-name="ce19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B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zeek_http_executable_download_from_webdav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E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file_event_win_malware_darkgate_autoit3_save_temp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9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nodejs_rce_exploitation_attempt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 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 </text:p>
          </table:table-cell>
          <table:table-cell table:style-name="ce19" office:value-type="string" calcext:value-type="string">
            <text:p>C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proc_creation_win_reg_query_registry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9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B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app_python_sql_exceptions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 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 </text:p>
          </table:table-cell>
          <table:table-cell table:style-name="ce19" office:value-type="string" calcext:value-type="string">
            <text:p>C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file_event_macos_python_path_configuration_files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9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spring_application_exceptions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okta_policy_rule_modified_or_deleted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D</text:p>
          </table:table-cell>
          <table:table-cell table:style-name="ce19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D</text:p>
          </table:table-cell>
          <table:table-cell table:style-name="ce5"/>
          <table:table-cell table:style-name="ce29" table:number-columns-repeated="16"/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cisco_duo_mfa_bypass_via_bypass_cod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file_rename_win_non_dll_to_dll_ext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9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net_connection_win_silenttrinity_stager_msbuild_activity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A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posh_pm_alternate_powershell_hosts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9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proc_access_win_lsass_susp_access_flag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velocity_ssti_injection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C 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E</text:p>
          </table:table-cell>
          <table:table-cell table:style-name="ce19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C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zeek_dce_rpc_mitre_bzar_persistenc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 </text:p>
          </table:table-cell>
          <table:table-cell table:style-name="ce13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net_dns_susp_telegram_ap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9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3"/>
          <table:table-cell table:style-name="ce8"/>
          <table:table-cell table:style-name="ce13" table:number-columns-repeated="5"/>
          <table:table-cell table:style-name="ce19" table:number-columns-repeated="6"/>
          <table:table-cell table:style-name="ce3"/>
          <table:table-cell table:style-name="ce28" table:number-columns-repeated="16"/>
          <table:table-cell table:number-columns-repeated="994"/>
        </table:table-row>
        <table:table-row table:style-name="ro2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3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3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3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3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3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3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3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3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2" table:number-rows-repeated="930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22" table:number-columns-repeated="5"/>
          <table:table-cell table:style-name="ce4"/>
          <table:table-cell table:number-columns-repeated="101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2">
        <table:table-column table:style-name="co9" table:default-cell-style-name="Default"/>
        <table:table-column table:style-name="co10" table:default-cell-style-name="Default"/>
        <table:table-column table:style-name="co8" table:number-columns-repeated="1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1008" table:default-cell-style-name="Default"/>
        <table:table-row table:style-name="ro2">
          <table:table-cell table:style-name="ce30" office:value-type="string" calcext:value-type="string" table:number-columns-spanned="1" table:number-rows-spanned="3">
            <text:p>Regra</text:p>
          </table:table-cell>
          <table:table-cell table:style-name="ce35" office:value-type="string" calcext:value-type="string" table:number-columns-spanned="1" table:number-rows-spanned="3">
            <text:p>num</text:p>
          </table:table-cell>
          <table:table-cell table:style-name="ce39" office:value-type="string" calcext:value-type="string" table:number-columns-spanned="2" table:number-rows-spanned="2">
            <text:p>CHATGPT</text:p>
          </table:table-cell>
          <table:covered-table-cell/>
          <table:table-cell table:style-name="ce39" office:value-type="string" calcext:value-type="string" table:number-columns-spanned="2" table:number-rows-spanned="2">
            <text:p>GEMINI</text:p>
          </table:table-cell>
          <table:covered-table-cell/>
          <table:table-cell table:style-name="ce39" office:value-type="string" calcext:value-type="string" table:number-columns-spanned="2" table:number-rows-spanned="2">
            <text:p>CLAUDE</text:p>
          </table:table-cell>
          <table:covered-table-cell/>
          <table:table-cell table:style-name="ce39" office:value-type="string" calcext:value-type="string" table:number-columns-spanned="2" table:number-rows-spanned="2">
            <text:p>DEEPSEEK</text:p>
          </table:table-cell>
          <table:covered-table-cell/>
          <table:table-cell table:style-name="ce42" office:value-type="string" calcext:value-type="string" table:number-columns-spanned="2" table:number-rows-spanned="2">
            <text:p>COPILOT</text:p>
          </table:table-cell>
          <table:covered-table-cell table:style-name="ce43"/>
          <table:table-cell table:style-name="ce52" table:number-columns-repeated="2"/>
          <table:table-cell table:style-name="ce59"/>
          <table:table-cell table:style-name="ce61"/>
          <table:table-cell table:style-name="ce52" table:number-columns-repeated="10"/>
          <table:table-cell table:number-columns-repeated="998"/>
        </table:table-row>
        <table:table-row table:style-name="ro2">
          <table:covered-table-cell table:number-columns-repeated="11"/>
          <table:covered-table-cell table:style-name="ce43"/>
          <table:table-cell table:style-name="ce52" table:number-columns-repeated="2"/>
          <table:table-cell table:style-name="ce59"/>
          <table:table-cell table:style-name="ce61"/>
          <table:table-cell table:style-name="ce52" table:number-columns-repeated="10"/>
          <table:table-cell table:number-columns-repeated="998"/>
        </table:table-row>
        <table:table-row table:style-name="ro2">
          <table:covered-table-cell table:number-columns-repeated="2"/>
          <table:table-cell table:style-name="ce40" office:value-type="string" calcext:value-type="string">
            <text:p>prompt 1</text:p>
          </table:table-cell>
          <table:table-cell table:style-name="ce40" office:value-type="string" calcext:value-type="string">
            <text:p>prompt 2</text:p>
          </table:table-cell>
          <table:table-cell table:style-name="ce40" office:value-type="string" calcext:value-type="string">
            <text:p>prompt 1</text:p>
          </table:table-cell>
          <table:table-cell table:style-name="ce40" office:value-type="string" calcext:value-type="string">
            <text:p>prompt 2</text:p>
          </table:table-cell>
          <table:table-cell table:style-name="ce40" office:value-type="string" calcext:value-type="string">
            <text:p>prompt 1</text:p>
          </table:table-cell>
          <table:table-cell table:style-name="ce40" office:value-type="string" calcext:value-type="string">
            <text:p>prompt 2</text:p>
          </table:table-cell>
          <table:table-cell table:style-name="ce40" office:value-type="string" calcext:value-type="string">
            <text:p>prompt 1</text:p>
          </table:table-cell>
          <table:table-cell table:style-name="ce40" office:value-type="string" calcext:value-type="string">
            <text:p>prompt 2</text:p>
          </table:table-cell>
          <table:table-cell table:style-name="ce40" office:value-type="string" calcext:value-type="string">
            <text:p>prompt 1</text:p>
          </table:table-cell>
          <table:table-cell table:style-name="ce44" office:value-type="string" calcext:value-type="string">
            <text:p>prompt 2</text:p>
          </table:table-cell>
          <table:table-cell table:style-name="ce52" table:number-columns-repeated="2"/>
          <table:table-cell table:style-name="ce59"/>
          <table:table-cell table:style-name="ce61"/>
          <table:table-cell table:style-name="ce52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bitbucket_audit_unauthorized_full_data_export_triggered</text:p>
          </table:table-cell>
          <table:table-cell table:style-name="ce36" office:value-type="float" office:value="1" calcext:value-type="float">
            <text:p>1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ChatGPT</text:p>
          </table:table-cell>
          <table:table-cell table:number-columns-repeated="3" table:style-name="ce31" office:value-type="string" calcext:value-type="string">
            <text:p>Claude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4:.L4]; MATCH(MAX(COUNTIF([.C4:.L4]; [.C4:.L4])); COUNTIF([.C4:.L4]; [.C4:.L4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4:.L4]; [.C4:.L4]))" office:value-type="float" office:value="6" calcext:value-type="float">
            <text:p>6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azure_app_device_code_authentication</text:p>
          </table:table-cell>
          <table:table-cell table:style-name="ce36" office:value-type="float" office:value="2" calcext:value-type="float">
            <text:p>2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number-columns-repeated="6" table:style-name="ce32" office:value-type="string" calcext:value-type="string">
            <text:p>Claude</text:p>
          </table:table-cell>
          <table:table-cell table:style-name="ce46" office:value-type="string" calcext:value-type="string">
            <text:p>Claude</text:p>
          </table:table-cell>
          <table:table-cell table:style-name="ce54" table:number-matrix-columns-spanned="1" table:number-matrix-rows-spanned="1" table:formula="of:=INDEX([.C5:.L5]; MATCH(MAX(COUNTIF([.C5:.L5]; [.C5:.L5])); COUNTIF([.C5:.L5]; [.C5:.L5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5:.L5]; [.C5:.L5]))" office:value-type="float" office:value="8" calcext:value-type="float">
            <text:p>8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zeek_susp_kerberos_rc4</text:p>
          </table:table-cell>
          <table:table-cell table:style-name="ce36" office:value-type="float" office:value="3" calcext:value-type="float">
            <text:p>3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number-columns-repeated="6" table:style-name="ce31" office:value-type="string" calcext:value-type="string">
            <text:p>Claude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6:.L6]; MATCH(MAX(COUNTIF([.C6:.L6]; [.C6:.L6])); COUNTIF([.C6:.L6]; [.C6:.L6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6:.L6]; [.C6:.L6]))" office:value-type="float" office:value="8" calcext:value-type="float">
            <text:p>8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posh_ps_modify_group_policy_settings</text:p>
          </table:table-cell>
          <table:table-cell table:style-name="ce36" office:value-type="float" office:value="4" calcext:value-type="float">
            <text:p>4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number-columns-repeated="6" table:style-name="ce32" office:value-type="string" calcext:value-type="string">
            <text:p>Claude</text:p>
          </table:table-cell>
          <table:table-cell table:style-name="ce46" office:value-type="string" calcext:value-type="string">
            <text:p>ChatGPT</text:p>
          </table:table-cell>
          <table:table-cell table:style-name="ce54" table:number-matrix-columns-spanned="1" table:number-matrix-rows-spanned="1" table:formula="of:=INDEX([.C7:.L7]; MATCH(MAX(COUNTIF([.C7:.L7]; [.C7:.L7])); COUNTIF([.C7:.L7]; [.C7:.L7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7:.L7]; [.C7:.L7]))" office:value-type="float" office:value="7" calcext:value-type="float">
            <text:p>7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win_firewall_as_add_rule_wmiprvse</text:p>
          </table:table-cell>
          <table:table-cell table:style-name="ce36" office:value-type="float" office:value="5" calcext:value-type="float">
            <text:p>5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number-columns-repeated="3" table:style-name="ce31" office:value-type="string" calcext:value-type="string">
            <text:p>ChatGPT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45" office:value-type="string" calcext:value-type="string">
            <text:p>Gemini</text:p>
          </table:table-cell>
          <table:table-cell table:style-name="ce53" table:number-matrix-columns-spanned="1" table:number-matrix-rows-spanned="1" table:formula="of:=INDEX([.C8:.L8]; MATCH(MAX(COUNTIF([.C8:.L8]; [.C8:.L8])); COUNTIF([.C8:.L8]; [.C8:.L8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8:.L8]; [.C8:.L8]))" office:value-type="float" office:value="4" calcext:value-type="float">
            <text:p>4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huawei_bgp_auth_failed</text:p>
          </table:table-cell>
          <table:table-cell table:style-name="ce36" office:value-type="float" office:value="6" calcext:value-type="float">
            <text:p>6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number-columns-repeated="5" table:style-name="ce32" office:value-type="string" calcext:value-type="string">
            <text:p>Claude</text:p>
          </table:table-cell>
          <table:table-cell table:style-name="ce46" office:value-type="string" calcext:value-type="string">
            <text:p>Claude</text:p>
          </table:table-cell>
          <table:table-cell table:style-name="ce54" table:number-matrix-columns-spanned="1" table:number-matrix-rows-spanned="1" table:formula="of:=INDEX([.C9:.L9]; MATCH(MAX(COUNTIF([.C9:.L9]; [.C9:.L9])); COUNTIF([.C9:.L9]; [.C9:.L9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9:.L9]; [.C9:.L9]))" office:value-type="float" office:value="7" calcext:value-type="float">
            <text:p>7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rpc_firewall_printing_lateral_movement</text:p>
          </table:table-cell>
          <table:table-cell table:style-name="ce36" office:value-type="float" office:value="7" calcext:value-type="float">
            <text:p>7</text:p>
          </table:table-cell>
          <table:table-cell table:style-name="ce31" office:value-type="string" calcext:value-type="string">
            <text:p>Gemini</text:p>
          </table:table-cell>
          <table:table-cell table:number-columns-repeated="7"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10:.L10]; MATCH(MAX(COUNTIF([.C10:.L10]; [.C10:.L10])); COUNTIF([.C10:.L10]; [.C10:.L10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10:.L10]; [.C10:.L10]))" office:value-type="float" office:value="8" calcext:value-type="float">
            <text:p>8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registry_set_change_security_zones</text:p>
          </table:table-cell>
          <table:table-cell table:style-name="ce36" office:value-type="float" office:value="8" calcext:value-type="float">
            <text:p>8</text:p>
          </table:table-cell>
          <table:table-cell table:style-name="ce32" office:value-type="string" calcext:value-type="string">
            <text:p>Deepseek</text:p>
          </table:table-cell>
          <table:table-cell table:number-columns-repeated="6"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hatGPT</text:p>
          </table:table-cell>
          <table:table-cell table:style-name="ce54" table:number-matrix-columns-spanned="1" table:number-matrix-rows-spanned="1" table:formula="of:=INDEX([.C11:.L11]; MATCH(MAX(COUNTIF([.C11:.L11]; [.C11:.L11])); COUNTIF([.C11:.L11]; [.C11:.L11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11:.L11]; [.C11:.L11]))" office:value-type="float" office:value="7" calcext:value-type="float">
            <text:p>7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3" office:value-type="string" calcext:value-type="string">
            <text:p>app_sqlinjection_errors</text:p>
          </table:table-cell>
          <table:table-cell table:style-name="ce36" office:value-type="float" office:value="9" calcext:value-type="float">
            <text:p>9</text:p>
          </table:table-cell>
          <table:table-cell table:style-name="ce33" office:value-type="string" calcext:value-type="string">
            <text:p>ChatGPT</text:p>
          </table:table-cell>
          <table:table-cell table:style-name="ce33" office:value-type="string" calcext:value-type="string">
            <text:p>Claude</text:p>
          </table:table-cell>
          <table:table-cell table:style-name="ce33" office:value-type="string" calcext:value-type="string">
            <text:p>ChatGPT</text:p>
          </table:table-cell>
          <table:table-cell table:style-name="ce33" office:value-type="string" calcext:value-type="string">
            <text:p>Claude</text:p>
          </table:table-cell>
          <table:table-cell table:style-name="ce33" office:value-type="string" calcext:value-type="string">
            <text:p>ChatGPT</text:p>
          </table:table-cell>
          <table:table-cell table:style-name="ce33" office:value-type="string" calcext:value-type="string">
            <text:p>Claude</text:p>
          </table:table-cell>
          <table:table-cell table:number-columns-repeated="2" table:style-name="ce33" office:value-type="string" calcext:value-type="string">
            <text:p>ChatGPT</text:p>
          </table:table-cell>
          <table:table-cell table:style-name="ce33" office:value-type="string" calcext:value-type="string">
            <text:p>Claude</text:p>
          </table:table-cell>
          <table:table-cell table:style-name="ce47" office:value-type="string" calcext:value-type="string">
            <text:p>Deepseek</text:p>
          </table:table-cell>
          <table:table-cell table:style-name="ce53" table:number-matrix-columns-spanned="1" table:number-matrix-rows-spanned="1" table:formula="of:=INDEX([.C12:.L12]; MATCH(MAX(COUNTIF([.C12:.L12]; [.C12:.L12])); COUNTIF([.C12:.L12]; [.C12:.L12]); 0))" office:value-type="string" office:string-value="ChatGPT" calcext:value-type="string">
            <text:p>ChatGPT</text:p>
          </table:table-cell>
          <table:table-cell table:style-name="ce56" table:number-matrix-columns-spanned="1" table:number-matrix-rows-spanned="1" table:formula="of:=MAX(COUNTIF([.C12:.L12]; [.C12:.L12]))" office:value-type="float" office:value="5" calcext:value-type="float">
            <text:p>5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db_anomalous_query</text:p>
          </table:table-cell>
          <table:table-cell table:style-name="ce36" office:value-type="float" office:value="10" calcext:value-type="float">
            <text:p>10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number-columns-repeated="6" table:style-name="ce32" office:value-type="string" calcext:value-type="string">
            <text:p>Claude</text:p>
          </table:table-cell>
          <table:table-cell table:style-name="ce46" office:value-type="string" calcext:value-type="string">
            <text:p>Claude</text:p>
          </table:table-cell>
          <table:table-cell table:style-name="ce54" table:number-matrix-columns-spanned="1" table:number-matrix-rows-spanned="1" table:formula="of:=INDEX([.C13:.L13]; MATCH(MAX(COUNTIF([.C13:.L13]; [.C13:.L13])); COUNTIF([.C13:.L13]; [.C13:.L13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13:.L13]; [.C13:.L13]))" office:value-type="float" office:value="8" calcext:value-type="float">
            <text:p>8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file_delete_win_delete_exchange_powershell_logs</text:p>
          </table:table-cell>
          <table:table-cell table:style-name="ce36" office:value-type="float" office:value="11" calcext:value-type="float">
            <text:p>11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Copilot</text:p>
          </table:table-cell>
          <table:table-cell table:style-name="ce31" office:value-type="string" calcext:value-type="string">
            <text:p>ChatGPT</text:p>
          </table:table-cell>
          <table:table-cell table:number-columns-repeated="4" table:style-name="ce31" office:value-type="string" calcext:value-type="string">
            <text:p>Claude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14:.L14]; MATCH(MAX(COUNTIF([.C14:.L14]; [.C14:.L14])); COUNTIF([.C14:.L14]; [.C14:.L14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14:.L14]; [.C14:.L14]))" office:value-type="float" office:value="5" calcext:value-type="float">
            <text:p>5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net_dns_katz_stealer_domain</text:p>
          </table:table-cell>
          <table:table-cell table:style-name="ce36" office:value-type="float" office:value="12" calcext:value-type="float">
            <text:p>12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number-columns-repeated="2"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laude</text:p>
          </table:table-cell>
          <table:table-cell table:style-name="ce54" table:number-matrix-columns-spanned="1" table:number-matrix-rows-spanned="1" table:formula="of:=INDEX([.C15:.L15]; MATCH(MAX(COUNTIF([.C15:.L15]; [.C15:.L15])); COUNTIF([.C15:.L15]; [.C15:.L15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15:.L15]; [.C15:.L15]))" office:value-type="float" office:value="6" calcext:value-type="float">
            <text:p>6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opencanary_ssh_login_attempt</text:p>
          </table:table-cell>
          <table:table-cell table:style-name="ce36" office:value-type="float" office:value="13" calcext:value-type="float">
            <text:p>13</text:p>
          </table:table-cell>
          <table:table-cell table:style-name="ce31" office:value-type="string" calcext:value-type="string">
            <text:p>NONE</text:p>
          </table:table-cell>
          <table:table-cell table:number-columns-repeated="3"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number-columns-repeated="3" table:style-name="ce31" office:value-type="string" calcext:value-type="string">
            <text:p>Claude</text:p>
          </table:table-cell>
          <table:table-cell table:style-name="ce31" office:value-type="string" calcext:value-type="string">
            <text:p>Copilot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16:.L16]; MATCH(MAX(COUNTIF([.C16:.L16]; [.C16:.L16])); COUNTIF([.C16:.L16]; [.C16:.L16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16:.L16]; [.C16:.L16]))" office:value-type="float" office:value="7" calcext:value-type="float">
            <text:p>7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proxy_exploit_cve_2023_1389_unauth_command_injection_tplink_archer_ax21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6" table:style-name="ce32" office:value-type="string" calcext:value-type="string">
            <text:p>Deepseek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laude</text:p>
          </table:table-cell>
          <table:table-cell table:style-name="ce54" table:number-matrix-columns-spanned="1" table:number-matrix-rows-spanned="1" table:formula="of:=INDEX([.C17:.L17]; MATCH(MAX(COUNTIF([.C17:.L17]; [.C17:.L17])); COUNTIF([.C17:.L17]; [.C17:.L17]); 0))" office:value-type="string" office:string-value="Deepseek" calcext:value-type="string">
            <text:p>Deepseek</text:p>
          </table:table-cell>
          <table:table-cell table:style-name="ce57" table:number-matrix-columns-spanned="1" table:number-matrix-rows-spanned="1" table:formula="of:=MAX(COUNTIF([.C17:.L17]; [.C17:.L17]))" office:value-type="float" office:value="7" calcext:value-type="float">
            <text:p>7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registry_event_runkey_winekey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ChatGPT</text:p>
          </table:table-cell>
          <table:table-cell table:number-columns-repeated="4" table:style-name="ce31" office:value-type="string" calcext:value-type="string">
            <text:p>Claude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18:.L18]; MATCH(MAX(COUNTIF([.C18:.L18]; [.C18:.L18])); COUNTIF([.C18:.L18]; [.C18:.L18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18:.L18]; [.C18:.L18]))" office:value-type="float" office:value="8" calcext:value-type="float">
            <text:p>8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appframework_django_exceptions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number-columns-repeated="6" table:style-name="ce32" office:value-type="string" calcext:value-type="string">
            <text:p>Claude</text:p>
          </table:table-cell>
          <table:table-cell table:style-name="ce46" office:value-type="string" calcext:value-type="string">
            <text:p>Claude</text:p>
          </table:table-cell>
          <table:table-cell table:style-name="ce54" table:number-matrix-columns-spanned="1" table:number-matrix-rows-spanned="1" table:formula="of:=INDEX([.C19:.L19]; MATCH(MAX(COUNTIF([.C19:.L19]; [.C19:.L19])); COUNTIF([.C19:.L19]; [.C19:.L19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19:.L19]; [.C19:.L19]))" office:value-type="float" office:value="9" calcext:value-type="float">
            <text:p>9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github_delete_action_invoked</text:p>
          </table:table-cell>
          <table:table-cell table:style-name="ce36" office:value-type="float" office:value="17" calcext:value-type="float">
            <text:p>17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number-columns-repeated="2" table:style-name="ce31" office:value-type="string" calcext:value-type="string">
            <text:p>Deepseek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20:.L20]; MATCH(MAX(COUNTIF([.C20:.L20]; [.C20:.L20])); COUNTIF([.C20:.L20]; [.C20:.L20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20:.L20]; [.C20:.L20]))" office:value-type="float" office:value="5" calcext:value-type="float">
            <text:p>5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java_local_file_read</text:p>
          </table:table-cell>
          <table:table-cell table:style-name="ce36" office:value-type="float" office:value="18" calcext:value-type="float">
            <text:p>18</text:p>
          </table:table-cell>
          <table:table-cell table:style-name="ce32" office:value-type="string" calcext:value-type="string">
            <text:p>Copilot</text:p>
          </table:table-cell>
          <table:table-cell table:number-columns-repeated="2" table:style-name="ce32" office:value-type="string" calcext:value-type="string">
            <text:p>Claude</text:p>
          </table:table-cell>
          <table:table-cell table:style-name="ce32" office:value-type="string" calcext:value-type="string">
            <text:p>Copilot</text:p>
          </table:table-cell>
          <table:table-cell table:number-columns-repeated="5" table:style-name="ce32" office:value-type="string" calcext:value-type="string">
            <text:p>Claude</text:p>
          </table:table-cell>
          <table:table-cell table:style-name="ce46" office:value-type="string" calcext:value-type="string">
            <text:p>Copilot</text:p>
          </table:table-cell>
          <table:table-cell table:style-name="ce54" table:number-matrix-columns-spanned="1" table:number-matrix-rows-spanned="1" table:formula="of:=INDEX([.C21:.L21]; MATCH(MAX(COUNTIF([.C21:.L21]; [.C21:.L21])); COUNTIF([.C21:.L21]; [.C21:.L21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21:.L21]; [.C21:.L21]))" office:value-type="float" office:value="7" calcext:value-type="float">
            <text:p>7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kubernetes_audit_exec_into_container</text:p>
          </table:table-cell>
          <table:table-cell table:style-name="ce36" office:value-type="float" office:value="19" calcext:value-type="float">
            <text:p>19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number-columns-repeated="5" table:style-name="ce31" office:value-type="string" calcext:value-type="string">
            <text:p>Claude</text:p>
          </table:table-cell>
          <table:table-cell table:style-name="ce31" office:value-type="string" calcext:value-type="string">
            <text:p>Copilot</text:p>
          </table:table-cell>
          <table:table-cell table:style-name="ce45" office:value-type="string" calcext:value-type="string">
            <text:p>ChatGPT</text:p>
          </table:table-cell>
          <table:table-cell table:style-name="ce53" table:number-matrix-columns-spanned="1" table:number-matrix-rows-spanned="1" table:formula="of:=INDEX([.C22:.L22]; MATCH(MAX(COUNTIF([.C22:.L22]; [.C22:.L22])); COUNTIF([.C22:.L22]; [.C22:.L22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22:.L22]; [.C22:.L22]))" office:value-type="float" office:value="6" calcext:value-type="float">
            <text:p>6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kubernetes_audit_secrets_modified_or_deleted</text:p>
          </table:table-cell>
          <table:table-cell table:style-name="ce36" office:value-type="float" office:value="20" calcext:value-type="float">
            <text:p>20</text:p>
          </table:table-cell>
          <table:table-cell table:style-name="ce32" office:value-type="string" calcext:value-type="string">
            <text:p>Claude</text:p>
          </table:table-cell>
          <table:table-cell table:number-columns-repeated="2" table:style-name="ce32" office:value-type="string" calcext:value-type="string">
            <text:p>Deepseek</text:p>
          </table:table-cell>
          <table:table-cell table:number-columns-repeated="4"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opilot</text:p>
          </table:table-cell>
          <table:table-cell table:style-name="ce54" table:number-matrix-columns-spanned="1" table:number-matrix-rows-spanned="1" table:formula="of:=INDEX([.C23:.L23]; MATCH(MAX(COUNTIF([.C23:.L23]; [.C23:.L23])); COUNTIF([.C23:.L23]; [.C23:.L23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23:.L23]; [.C23:.L23]))" office:value-type="float" office:value="6" calcext:value-type="float">
            <text:p>6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av_exploit_cve_2021_34527_print_nightmare</text:p>
          </table:table-cell>
          <table:table-cell table:style-name="ce36" office:value-type="float" office:value="21" calcext:value-type="float">
            <text:p>21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45" office:value-type="string" calcext:value-type="string">
            <text:p>Copilot</text:p>
          </table:table-cell>
          <table:table-cell table:style-name="ce53" table:number-matrix-columns-spanned="1" table:number-matrix-rows-spanned="1" table:formula="of:=INDEX([.C24:.L24]; MATCH(MAX(COUNTIF([.C24:.L24]; [.C24:.L24])); COUNTIF([.C24:.L24]; [.C24:.L24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24:.L24]; [.C24:.L24]))" office:value-type="float" office:value="5" calcext:value-type="float">
            <text:p>5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microsoft365_new_federated_domain_added_audit</text:p>
          </table:table-cell>
          <table:table-cell table:style-name="ce36" office:value-type="float" office:value="22" calcext:value-type="float">
            <text:p>22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number-columns-repeated="3"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style-name="ce46" office:value-type="string" calcext:value-type="string">
            <text:p>Copilot</text:p>
          </table:table-cell>
          <table:table-cell table:style-name="ce54" table:number-matrix-columns-spanned="1" table:number-matrix-rows-spanned="1" table:formula="of:=INDEX([.C25:.L25]; MATCH(MAX(COUNTIF([.C25:.L25]; [.C25:.L25])); COUNTIF([.C25:.L25]; [.C25:.L25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25:.L25]; [.C25:.L25]))" office:value-type="float" office:value="5" calcext:value-type="float">
            <text:p>5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win_appxdeployment_server_appx_downloaded_from_file_sharing_domains</text:p>
          </table:table-cell>
          <table:table-cell table:style-name="ce36" office:value-type="float" office:value="23" calcext:value-type="float">
            <text:p>23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Deepseek</text:p>
          </table:table-cell>
          <table:table-cell table:number-columns-repeated="3" table:style-name="ce31" office:value-type="string" calcext:value-type="string">
            <text:p>Claude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Copilot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26:.L26]; MATCH(MAX(COUNTIF([.C26:.L26]; [.C26:.L26])); COUNTIF([.C26:.L26]; [.C26:.L26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26:.L26]; [.C26:.L26]))" office:value-type="float" office:value="4" calcext:value-type="float">
            <text:p>4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file_event_lnx_doas_conf_creation</text:p>
          </table:table-cell>
          <table:table-cell table:style-name="ce36" office:value-type="float" office:value="24" calcext:value-type="float">
            <text:p>24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number-columns-repeated="2" table:style-name="ce32" office:value-type="string" calcext:value-type="string">
            <text:p>Gemini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opilot</text:p>
          </table:table-cell>
          <table:table-cell table:style-name="ce54" table:number-matrix-columns-spanned="1" table:number-matrix-rows-spanned="1" table:formula="of:=INDEX([.C27:.L27]; MATCH(MAX(COUNTIF([.C27:.L27]; [.C27:.L27])); COUNTIF([.C27:.L27]; [.C27:.L27]); 0))" office:value-type="string" office:string-value="Deepseek" calcext:value-type="string">
            <text:p>Deepseek</text:p>
          </table:table-cell>
          <table:table-cell table:style-name="ce57" table:number-matrix-columns-spanned="1" table:number-matrix-rows-spanned="1" table:formula="of:=MAX(COUNTIF([.C27:.L27]; [.C27:.L27]))" office:value-type="float" office:value="3" calcext:value-type="float">
            <text:p>3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posh_pm_invoke_obfuscation_stdin</text:p>
          </table:table-cell>
          <table:table-cell table:style-name="ce36" office:value-type="float" office:value="25" calcext:value-type="float">
            <text:p>25</text:p>
          </table:table-cell>
          <table:table-cell table:style-name="ce31" office:value-type="string" calcext:value-type="string">
            <text:p>ChatGPT</text:p>
          </table:table-cell>
          <table:table-cell table:number-columns-repeated="3"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number-columns-repeated="4" table:style-name="ce31" office:value-type="string" calcext:value-type="string">
            <text:p>Claude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28:.L28]; MATCH(MAX(COUNTIF([.C28:.L28]; [.C28:.L28])); COUNTIF([.C28:.L28]; [.C28:.L28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28:.L28]; [.C28:.L28]))" office:value-type="float" office:value="8" calcext:value-type="float">
            <text:p>8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win_security_exploit_cve_2023_36884_office_windows_html_rce_share_access_pattern</text:p>
          </table:table-cell>
          <table:table-cell table:style-name="ce36" office:value-type="float" office:value="26" calcext:value-type="float">
            <text:p>26</text:p>
          </table:table-cell>
          <table:table-cell table:style-name="ce32" office:value-type="string" calcext:value-type="string">
            <text:p>Gemini</text:p>
          </table:table-cell>
          <table:table-cell table:number-columns-repeated="3"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Copilot</text:p>
          </table:table-cell>
          <table:table-cell table:style-name="ce46" office:value-type="string" calcext:value-type="string">
            <text:p>Claude</text:p>
          </table:table-cell>
          <table:table-cell table:style-name="ce54" table:number-matrix-columns-spanned="1" table:number-matrix-rows-spanned="1" table:formula="of:=INDEX([.C29:.L29]; MATCH(MAX(COUNTIF([.C29:.L29]; [.C29:.L29])); COUNTIF([.C29:.L29]; [.C29:.L29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29:.L29]; [.C29:.L29]))" office:value-type="float" office:value="5" calcext:value-type="float">
            <text:p>5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appframework_ruby_on_rails_exceptions</text:p>
          </table:table-cell>
          <table:table-cell table:style-name="ce36" office:value-type="float" office:value="27" calcext:value-type="float">
            <text:p>27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number-columns-repeated="2"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45" office:value-type="string" calcext:value-type="string">
            <text:p>Copilot</text:p>
          </table:table-cell>
          <table:table-cell table:style-name="ce53" table:number-matrix-columns-spanned="1" table:number-matrix-rows-spanned="1" table:formula="of:=INDEX([.C30:.L30]; MATCH(MAX(COUNTIF([.C30:.L30]; [.C30:.L30])); COUNTIF([.C30:.L30]; [.C30:.L30]); 0))" office:value-type="string" office:string-value="Gemini" calcext:value-type="string">
            <text:p>Gemini</text:p>
          </table:table-cell>
          <table:table-cell table:style-name="ce56" table:number-matrix-columns-spanned="1" table:number-matrix-rows-spanned="1" table:formula="of:=MAX(COUNTIF([.C30:.L30]; [.C30:.L30]))" office:value-type="float" office:value="5" calcext:value-type="float">
            <text:p>5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pipe_created_sysinternals_psexec_default_pipe_susp_location</text:p>
          </table:table-cell>
          <table:table-cell table:style-name="ce36" office:value-type="float" office:value="28" calcext:value-type="float">
            <text:p>28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Copilot</text:p>
          </table:table-cell>
          <table:table-cell table:style-name="ce46" office:value-type="string" calcext:value-type="string">
            <text:p>Copilot</text:p>
          </table:table-cell>
          <table:table-cell table:style-name="ce54" table:number-matrix-columns-spanned="1" table:number-matrix-rows-spanned="1" table:formula="of:=INDEX([.C31:.L31]; MATCH(MAX(COUNTIF([.C31:.L31]; [.C31:.L31])); COUNTIF([.C31:.L31]; [.C31:.L31]); 0))" office:value-type="string" office:string-value="ChatGPT" calcext:value-type="string">
            <text:p>ChatGPT</text:p>
          </table:table-cell>
          <table:table-cell table:style-name="ce57" table:number-matrix-columns-spanned="1" table:number-matrix-rows-spanned="1" table:formula="of:=MAX(COUNTIF([.C31:.L31]; [.C31:.L31]))" office:value-type="float" office:value="4" calcext:value-type="float">
            <text:p>4</text:p>
          </table:table-cell>
          <table:table-cell table:style-name="ce54" office:value-type="string" calcext:value-type="string">
            <text:p>Claude</text:p>
          </table:table-cell>
          <table:table-cell table:style-name="ce57" office:value-type="float" office:value="4" calcext:value-type="float">
            <text:p>4</text:p>
          </table:table-cell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file_event_win_susp_startup_folder_persistence</text:p>
          </table:table-cell>
          <table:table-cell table:style-name="ce36" office:value-type="float" office:value="29" calcext:value-type="float">
            <text:p>29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ChatGPT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32:.L32]; MATCH(MAX(COUNTIF([.C32:.L32]; [.C32:.L32])); COUNTIF([.C32:.L32]; [.C32:.L32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32:.L32]; [.C32:.L32]))" office:value-type="float" office:value="5" calcext:value-type="float">
            <text:p>5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proc_creation_macos_remote_access_tools_meshagent_arguments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5"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laude</text:p>
          </table:table-cell>
          <table:table-cell table:style-name="ce54" table:number-matrix-columns-spanned="1" table:number-matrix-rows-spanned="1" table:formula="of:=INDEX([.C33:.L33]; MATCH(MAX(COUNTIF([.C33:.L33]; [.C33:.L33])); COUNTIF([.C33:.L33]; [.C33:.L33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33:.L33]; [.C33:.L33]))" office:value-type="float" office:value="8" calcext:value-type="float">
            <text:p>8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create_remote_thread_win_powershell_generic.yml</text:p>
          </table:table-cell>
          <table:table-cell table:style-name="ce36" office:value-type="float" office:value="31" calcext:value-type="float">
            <text:p>31</text:p>
          </table:table-cell>
          <table:table-cell table:style-name="ce31" office:value-type="string" calcext:value-type="string">
            <text:p>Copilot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Copilot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Copilot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Copilot</text:p>
          </table:table-cell>
          <table:table-cell table:style-name="ce45" office:value-type="string" calcext:value-type="string">
            <text:p>Copilot</text:p>
          </table:table-cell>
          <table:table-cell table:style-name="ce53" table:number-matrix-columns-spanned="1" table:number-matrix-rows-spanned="1" table:formula="of:=INDEX([.C34:.L34]; MATCH(MAX(COUNTIF([.C34:.L34]; [.C34:.L34])); COUNTIF([.C34:.L34]; [.C34:.L34]); 0))" office:value-type="string" office:string-value="Copilot" calcext:value-type="string">
            <text:p>Copilot</text:p>
          </table:table-cell>
          <table:table-cell table:style-name="ce56" table:number-matrix-columns-spanned="1" table:number-matrix-rows-spanned="1" table:formula="of:=MAX(COUNTIF([.C34:.L34]; [.C34:.L34]))" office:value-type="float" office:value="5" calcext:value-type="float">
            <text:p>5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image_load_susp_clickonce_unsigned_module_loaded</text:p>
          </table:table-cell>
          <table:table-cell table:style-name="ce36" office:value-type="float" office:value="32" calcext:value-type="float">
            <text:p>32</text:p>
          </table:table-cell>
          <table:table-cell table:style-name="ce32" office:value-type="string" calcext:value-type="string">
            <text:p>Copilot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hatGPT</text:p>
          </table:table-cell>
          <table:table-cell table:number-columns-repeated="3" table:style-name="ce32" office:value-type="string" calcext:value-type="string">
            <text:p>Deepseek</text:p>
          </table:table-cell>
          <table:table-cell table:style-name="ce32" office:value-type="string" calcext:value-type="string">
            <text:p>Copilot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opilot</text:p>
          </table:table-cell>
          <table:table-cell table:style-name="ce54" table:number-matrix-columns-spanned="1" table:number-matrix-rows-spanned="1" table:formula="of:=INDEX([.C35:.L35]; MATCH(MAX(COUNTIF([.C35:.L35]; [.C35:.L35])); COUNTIF([.C35:.L35]; [.C35:.L35]); 0))" office:value-type="string" office:string-value="Deepseek" calcext:value-type="string">
            <text:p>Deepseek</text:p>
          </table:table-cell>
          <table:table-cell table:style-name="ce57" table:number-matrix-columns-spanned="1" table:number-matrix-rows-spanned="1" table:formula="of:=MAX(COUNTIF([.C35:.L35]; [.C35:.L35]))" office:value-type="float" office:value="5" calcext:value-type="float">
            <text:p>5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web_sql_injection_in_access_logs</text:p>
          </table:table-cell>
          <table:table-cell table:style-name="ce36" office:value-type="float" office:value="33" calcext:value-type="float">
            <text:p>33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Copilot</text:p>
          </table:table-cell>
          <table:table-cell table:style-name="ce31" office:value-type="string" calcext:value-type="string">
            <text:p>Deepseek</text:p>
          </table:table-cell>
          <table:table-cell table:number-columns-repeated="3" table:style-name="ce31" office:value-type="string" calcext:value-type="string">
            <text:p>Claude</text:p>
          </table:table-cell>
          <table:table-cell table:style-name="ce31" office:value-type="string" calcext:value-type="string">
            <text:p>ChatGPT</text:p>
          </table:table-cell>
          <table:table-cell table:style-name="ce45" office:value-type="string" calcext:value-type="string">
            <text:p>ChatGPT</text:p>
          </table:table-cell>
          <table:table-cell table:style-name="ce53" table:number-matrix-columns-spanned="1" table:number-matrix-rows-spanned="1" table:formula="of:=INDEX([.C36:.L36]; MATCH(MAX(COUNTIF([.C36:.L36]; [.C36:.L36])); COUNTIF([.C36:.L36]; [.C36:.L36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36:.L36]; [.C36:.L36]))" office:value-type="float" office:value="4" calcext:value-type="float">
            <text:p>4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proc_creation_lnx_mal_shai_hulud_indicator</text:p>
          </table:table-cell>
          <table:table-cell table:style-name="ce36" office:value-type="float" office:value="34" calcext:value-type="float">
            <text:p>34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number-columns-repeated="2" table:style-name="ce32" office:value-type="string" calcext:value-type="string">
            <text:p>Deepseek</text:p>
          </table:table-cell>
          <table:table-cell table:number-columns-repeated="4" table:style-name="ce32" office:value-type="string" calcext:value-type="string">
            <text:p>Claude</text:p>
          </table:table-cell>
          <table:table-cell table:style-name="ce46" office:value-type="string" calcext:value-type="string">
            <text:p>Gemini</text:p>
          </table:table-cell>
          <table:table-cell table:style-name="ce54" table:number-matrix-columns-spanned="1" table:number-matrix-rows-spanned="1" table:formula="of:=INDEX([.C37:.L37]; MATCH(MAX(COUNTIF([.C37:.L37]; [.C37:.L37])); COUNTIF([.C37:.L37]; [.C37:.L37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37:.L37]; [.C37:.L37]))" office:value-type="float" office:value="5" calcext:value-type="float">
            <text:p>5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zeek_http_executable_download_from_webdav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2"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number-columns-repeated="2"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number-columns-repeated="2"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45" office:value-type="string" calcext:value-type="string">
            <text:p>Copilot</text:p>
          </table:table-cell>
          <table:table-cell table:style-name="ce53" table:number-matrix-columns-spanned="1" table:number-matrix-rows-spanned="1" table:formula="of:=INDEX([.C38:.L38]; MATCH(MAX(COUNTIF([.C38:.L38]; [.C38:.L38])); COUNTIF([.C38:.L38]; [.C38:.L38]); 0))" office:value-type="string" office:string-value="Deepseek" calcext:value-type="string">
            <text:p>Deepseek</text:p>
          </table:table-cell>
          <table:table-cell table:style-name="ce56" table:number-matrix-columns-spanned="1" table:number-matrix-rows-spanned="1" table:formula="of:=MAX(COUNTIF([.C38:.L38]; [.C38:.L38]))" office:value-type="float" office:value="6" calcext:value-type="float">
            <text:p>6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file_event_win_malware_darkgate_autoit3_save_temp</text:p>
          </table:table-cell>
          <table:table-cell table:style-name="ce36" office:value-type="float" office:value="36" calcext:value-type="float">
            <text:p>36</text:p>
          </table:table-cell>
          <table:table-cell table:style-name="ce32" office:value-type="string" calcext:value-type="string">
            <text:p>NONE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number-columns-repeated="2"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Deepseek</text:p>
          </table:table-cell>
          <table:table-cell table:style-name="ce46" office:value-type="string" calcext:value-type="string">
            <text:p>Claude</text:p>
          </table:table-cell>
          <table:table-cell table:style-name="ce54" table:number-matrix-columns-spanned="1" table:number-matrix-rows-spanned="1" table:formula="of:=INDEX([.C39:.L39]; MATCH(MAX(COUNTIF([.C39:.L39]; [.C39:.L39])); COUNTIF([.C39:.L39]; [.C39:.L39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39:.L39]; [.C39:.L39]))" office:value-type="float" office:value="5" calcext:value-type="float">
            <text:p>5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nodejs_rce_exploitation_attempt</text:p>
          </table:table-cell>
          <table:table-cell table:style-name="ce36" office:value-type="float" office:value="37" calcext:value-type="float">
            <text:p>37</text:p>
          </table:table-cell>
          <table:table-cell table:style-name="ce31" office:value-type="string" calcext:value-type="string">
            <text:p>NONE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number-columns-repeated="2" table:style-name="ce31" office:value-type="string" calcext:value-type="string">
            <text:p>ChatGPT</text:p>
          </table:table-cell>
          <table:table-cell table:style-name="ce45" office:value-type="string" calcext:value-type="string">
            <text:p>Copilot</text:p>
          </table:table-cell>
          <table:table-cell table:style-name="ce53" table:number-matrix-columns-spanned="1" table:number-matrix-rows-spanned="1" table:formula="of:=INDEX([.C40:.L40]; MATCH(MAX(COUNTIF([.C40:.L40]; [.C40:.L40])); COUNTIF([.C40:.L40]; [.C40:.L40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40:.L40]; [.C40:.L40]))" office:value-type="float" office:value="3" calcext:value-type="float">
            <text:p>3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proc_creation_win_reg_query_registry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3"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number-columns-repeated="3" table:style-name="ce32" office:value-type="string" calcext:value-type="string">
            <text:p>Deepseek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Copilot</text:p>
          </table:table-cell>
          <table:table-cell table:style-name="ce46" office:value-type="string" calcext:value-type="string">
            <text:p>Copilot</text:p>
          </table:table-cell>
          <table:table-cell table:style-name="ce54" table:number-matrix-columns-spanned="1" table:number-matrix-rows-spanned="1" table:formula="of:=INDEX([.C41:.L41]; MATCH(MAX(COUNTIF([.C41:.L41]; [.C41:.L41])); COUNTIF([.C41:.L41]; [.C41:.L41]); 0))" office:value-type="string" office:string-value="Deepseek" calcext:value-type="string">
            <text:p>Deepseek</text:p>
          </table:table-cell>
          <table:table-cell table:style-name="ce57" table:number-matrix-columns-spanned="1" table:number-matrix-rows-spanned="1" table:formula="of:=MAX(COUNTIF([.C41:.L41]; [.C41:.L41]))" office:value-type="float" office:value="6" calcext:value-type="float">
            <text:p>6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app_python_sql_exceptions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5"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45" office:value-type="string" calcext:value-type="string">
            <text:p>Copilot</text:p>
          </table:table-cell>
          <table:table-cell table:style-name="ce53" table:number-matrix-columns-spanned="1" table:number-matrix-rows-spanned="1" table:formula="of:=INDEX([.C42:.L42]; MATCH(MAX(COUNTIF([.C42:.L42]; [.C42:.L42])); COUNTIF([.C42:.L42]; [.C42:.L42]); 0))" office:value-type="string" office:string-value="Deepseek" calcext:value-type="string">
            <text:p>Deepseek</text:p>
          </table:table-cell>
          <table:table-cell table:style-name="ce56" table:number-matrix-columns-spanned="1" table:number-matrix-rows-spanned="1" table:formula="of:=MAX(COUNTIF([.C42:.L42]; [.C42:.L42]))" office:value-type="float" office:value="6" calcext:value-type="float">
            <text:p>6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file_event_macos_python_path_configuration_files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4"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number-columns-repeated="2"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opilot</text:p>
          </table:table-cell>
          <table:table-cell table:style-name="ce54" table:number-matrix-columns-spanned="1" table:number-matrix-rows-spanned="1" table:formula="of:=INDEX([.C43:.L43]; MATCH(MAX(COUNTIF([.C43:.L43]; [.C43:.L43])); COUNTIF([.C43:.L43]; [.C43:.L43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43:.L43]; [.C43:.L43]))" office:value-type="float" office:value="7" calcext:value-type="float">
            <text:p>7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spring_application_exceptions</text:p>
          </table:table-cell>
          <table:table-cell table:style-name="ce36" office:value-type="float" office:value="41" calcext:value-type="float">
            <text:p>41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Copilot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45" office:value-type="string" calcext:value-type="string">
            <text:p>Gemini</text:p>
          </table:table-cell>
          <table:table-cell table:style-name="ce53" table:number-matrix-columns-spanned="1" table:number-matrix-rows-spanned="1" table:formula="of:=INDEX([.C44:.L44]; MATCH(MAX(COUNTIF([.C44:.L44]; [.C44:.L44])); COUNTIF([.C44:.L44]; [.C44:.L44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44:.L44]; [.C44:.L44]))" office:value-type="float" office:value="4" calcext:value-type="float">
            <text:p>4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okta_policy_rule_modified_or_deleted</text:p>
          </table:table-cell>
          <table:table-cell table:style-name="ce36" office:value-type="float" office:value="42" calcext:value-type="float">
            <text:p>42</text:p>
          </table:table-cell>
          <table:table-cell table:number-columns-repeated="3"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opilot</text:p>
          </table:table-cell>
          <table:table-cell table:style-name="ce54" table:number-matrix-columns-spanned="1" table:number-matrix-rows-spanned="1" table:formula="of:=INDEX([.C45:.L45]; MATCH(MAX(COUNTIF([.C45:.L45]; [.C45:.L45])); COUNTIF([.C45:.L45]; [.C45:.L45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45:.L45]; [.C45:.L45]))" office:value-type="float" office:value="5" calcext:value-type="float">
            <text:p>5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cisco_duo_mfa_bypass_via_bypass_code</text:p>
          </table:table-cell>
          <table:table-cell table:style-name="ce36" office:value-type="float" office:value="43" calcext:value-type="float">
            <text:p>43</text:p>
          </table:table-cell>
          <table:table-cell table:style-name="ce31" office:value-type="string" calcext:value-type="string">
            <text:p>Deepseek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Gemini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office:value-type="string" calcext:value-type="string">
            <text:p>Copilot</text:p>
          </table:table-cell>
          <table:table-cell table:style-name="ce31" office:value-type="string" calcext:value-type="string">
            <text:p>Claude</text:p>
          </table:table-cell>
          <table:table-cell table:style-name="ce45" office:value-type="string" calcext:value-type="string">
            <text:p>ChatGPT</text:p>
          </table:table-cell>
          <table:table-cell table:style-name="ce53" table:number-matrix-columns-spanned="1" table:number-matrix-rows-spanned="1" table:formula="of:=INDEX([.C46:.L46]; MATCH(MAX(COUNTIF([.C46:.L46]; [.C46:.L46])); COUNTIF([.C46:.L46]; [.C46:.L46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46:.L46]; [.C46:.L46]))" office:value-type="float" office:value="5" calcext:value-type="float">
            <text:p>5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file_rename_win_non_dll_to_dll_ext</text:p>
          </table:table-cell>
          <table:table-cell table:style-name="ce36" office:value-type="float" office:value="44" calcext:value-type="float">
            <text:p>44</text:p>
          </table:table-cell>
          <table:table-cell table:style-name="ce32" office:value-type="string" calcext:value-type="string">
            <text:p>NONE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number-columns-repeated="2"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hatGPT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opilot</text:p>
          </table:table-cell>
          <table:table-cell table:style-name="ce54" table:number-matrix-columns-spanned="1" table:number-matrix-rows-spanned="1" table:formula="of:=INDEX([.C47:.L47]; MATCH(MAX(COUNTIF([.C47:.L47]; [.C47:.L47])); COUNTIF([.C47:.L47]; [.C47:.L47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47:.L47]; [.C47:.L47]))" office:value-type="float" office:value="4" calcext:value-type="float">
            <text:p>4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net_connection_win_silenttrinity_stager_msbuild_activity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3" table:style-name="ce31" office:value-type="string" calcext:value-type="string">
            <text:p>Claude</text:p>
          </table:table-cell>
          <table:table-cell table:style-name="ce31" office:value-type="string" calcext:value-type="string">
            <text:p>Copilot</text:p>
          </table:table-cell>
          <table:table-cell table:number-columns-repeated="5" table:style-name="ce31" office:value-type="string" calcext:value-type="string">
            <text:p>Claude</text:p>
          </table:table-cell>
          <table:table-cell table:style-name="ce45" office:value-type="string" calcext:value-type="string">
            <text:p>ChatGPT</text:p>
          </table:table-cell>
          <table:table-cell table:style-name="ce53" table:number-matrix-columns-spanned="1" table:number-matrix-rows-spanned="1" table:formula="of:=INDEX([.C48:.L48]; MATCH(MAX(COUNTIF([.C48:.L48]; [.C48:.L48])); COUNTIF([.C48:.L48]; [.C48:.L48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48:.L48]; [.C48:.L48]))" office:value-type="float" office:value="8" calcext:value-type="float">
            <text:p>8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posh_pm_alternate_powershell_hosts</text:p>
          </table:table-cell>
          <table:table-cell table:style-name="ce36" office:value-type="float" office:value="46" calcext:value-type="float">
            <text:p>46</text:p>
          </table:table-cell>
          <table:table-cell table:style-name="ce32" office:value-type="string" calcext:value-type="string">
            <text:p>NONE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Gemini</text:p>
          </table:table-cell>
          <table:table-cell table:style-name="ce32" office:value-type="string" calcext:value-type="string">
            <text:p>Claude</text:p>
          </table:table-cell>
          <table:table-cell table:number-columns-repeated="2"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32" office:value-type="string" calcext:value-type="string">
            <text:p>Deepseek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Claude</text:p>
          </table:table-cell>
          <table:table-cell table:style-name="ce54" table:number-matrix-columns-spanned="1" table:number-matrix-rows-spanned="1" table:formula="of:=INDEX([.C49:.L49]; MATCH(MAX(COUNTIF([.C49:.L49]; [.C49:.L49])); COUNTIF([.C49:.L49]; [.C49:.L49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49:.L49]; [.C49:.L49]))" office:value-type="float" office:value="5" calcext:value-type="float">
            <text:p>5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proc_access_win_lsass_susp_access_flag</text:p>
          </table:table-cell>
          <table:table-cell table:style-name="ce36" office:value-type="float" office:value="47" calcext:value-type="float">
            <text:p>47</text:p>
          </table:table-cell>
          <table:table-cell table:style-name="ce31" office:value-type="string" calcext:value-type="string">
            <text:p>Gemini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number-columns-repeated="3" table:style-name="ce31" office:value-type="string" calcext:value-type="string">
            <text:p>Claude</text:p>
          </table:table-cell>
          <table:table-cell table:number-columns-repeated="2" table:style-name="ce31" office:value-type="string" calcext:value-type="string">
            <text:p>ChatGPT</text:p>
          </table:table-cell>
          <table:table-cell table:style-name="ce45" office:value-type="string" calcext:value-type="string">
            <text:p>Claude</text:p>
          </table:table-cell>
          <table:table-cell table:style-name="ce53" table:number-matrix-columns-spanned="1" table:number-matrix-rows-spanned="1" table:formula="of:=INDEX([.C50:.L50]; MATCH(MAX(COUNTIF([.C50:.L50]; [.C50:.L50])); COUNTIF([.C50:.L50]; [.C50:.L50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50:.L50]; [.C50:.L50]))" office:value-type="float" office:value="6" calcext:value-type="float">
            <text:p>6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velocity_ssti_injection</text:p>
          </table:table-cell>
          <table:table-cell table:style-name="ce36" office:value-type="float" office:value="48" calcext:value-type="float">
            <text:p>48</text:p>
          </table:table-cell>
          <table:table-cell table:style-name="ce32" office:value-type="string" calcext:value-type="string">
            <text:p>Gemini</text:p>
          </table:table-cell>
          <table:table-cell table:number-columns-repeated="5" table:style-name="ce32" office:value-type="string" calcext:value-type="string">
            <text:p>Claude</text:p>
          </table:table-cell>
          <table:table-cell table:number-columns-repeated="2" table:style-name="ce32" office:value-type="string" calcext:value-type="string">
            <text:p>Gemini</text:p>
          </table:table-cell>
          <table:table-cell table:style-name="ce32" office:value-type="string" calcext:value-type="string">
            <text:p>Claude</text:p>
          </table:table-cell>
          <table:table-cell table:style-name="ce46" office:value-type="string" calcext:value-type="string">
            <text:p>Deepseek</text:p>
          </table:table-cell>
          <table:table-cell table:style-name="ce54" table:number-matrix-columns-spanned="1" table:number-matrix-rows-spanned="1" table:formula="of:=INDEX([.C51:.L51]; MATCH(MAX(COUNTIF([.C51:.L51]; [.C51:.L51])); COUNTIF([.C51:.L51]; [.C51:.L51]); 0))" office:value-type="string" office:string-value="Claude" calcext:value-type="string">
            <text:p>Claude</text:p>
          </table:table-cell>
          <table:table-cell table:style-name="ce57" table:number-matrix-columns-spanned="1" table:number-matrix-rows-spanned="1" table:formula="of:=MAX(COUNTIF([.C51:.L51]; [.C51:.L51]))" office:value-type="float" office:value="6" calcext:value-type="float">
            <text:p>6</text:p>
          </table:table-cell>
          <table:table-cell table:style-name="ce54"/>
          <table:table-cell table:style-name="ce57"/>
          <table:table-cell table:style-name="ce63" table:number-columns-repeated="10"/>
          <table:table-cell table:number-columns-repeated="998"/>
        </table:table-row>
        <table:table-row table:style-name="ro2">
          <table:table-cell table:style-name="ce31" office:value-type="string" calcext:value-type="string">
            <text:p>zeek_dce_rpc_mitre_bzar_persistence</text:p>
          </table:table-cell>
          <table:table-cell table:style-name="ce36" office:value-type="float" office:value="49" calcext:value-type="float">
            <text:p>49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Deepseek</text:p>
          </table:table-cell>
          <table:table-cell table:number-columns-repeated="7" table:style-name="ce31" office:value-type="string" calcext:value-type="string">
            <text:p>Claude</text:p>
          </table:table-cell>
          <table:table-cell table:style-name="ce45" office:value-type="string" calcext:value-type="string">
            <text:p>Deepseek</text:p>
          </table:table-cell>
          <table:table-cell table:style-name="ce53" table:number-matrix-columns-spanned="1" table:number-matrix-rows-spanned="1" table:formula="of:=INDEX([.C52:.L52]; MATCH(MAX(COUNTIF([.C52:.L52]; [.C52:.L52])); COUNTIF([.C52:.L52]; [.C52:.L52]); 0))" office:value-type="string" office:string-value="Claude" calcext:value-type="string">
            <text:p>Claude</text:p>
          </table:table-cell>
          <table:table-cell table:style-name="ce56" table:number-matrix-columns-spanned="1" table:number-matrix-rows-spanned="1" table:formula="of:=MAX(COUNTIF([.C52:.L52]; [.C52:.L52]))" office:value-type="float" office:value="7" calcext:value-type="float">
            <text:p>7</text:p>
          </table:table-cell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 table:style-name="ce34" office:value-type="string" calcext:value-type="string">
            <text:p>net_dns_susp_telegram_api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4" office:value-type="string" calcext:value-type="string">
            <text:p>Deepseek</text:p>
          </table:table-cell>
          <table:table-cell table:style-name="ce34" office:value-type="string" calcext:value-type="string">
            <text:p>Gemini</text:p>
          </table:table-cell>
          <table:table-cell table:number-columns-repeated="3" table:style-name="ce34" office:value-type="string" calcext:value-type="string">
            <text:p>Deepseek</text:p>
          </table:table-cell>
          <table:table-cell table:style-name="ce34" office:value-type="string" calcext:value-type="string">
            <text:p>Claude</text:p>
          </table:table-cell>
          <table:table-cell table:style-name="ce34" office:value-type="string" calcext:value-type="string">
            <text:p>Deepseek</text:p>
          </table:table-cell>
          <table:table-cell table:style-name="ce34" office:value-type="string" calcext:value-type="string">
            <text:p>Claude</text:p>
          </table:table-cell>
          <table:table-cell table:style-name="ce48" office:value-type="string" calcext:value-type="string">
            <text:p>Claude</text:p>
          </table:table-cell>
          <table:table-cell table:style-name="ce55" table:number-matrix-columns-spanned="1" table:number-matrix-rows-spanned="1" table:formula="of:=INDEX([.C53:.L53]; MATCH(MAX(COUNTIF([.C53:.L53]; [.C53:.L53])); COUNTIF([.C53:.L53]; [.C53:.L53]); 0))" office:value-type="string" office:string-value="Deepseek" calcext:value-type="string">
            <text:p>Deepseek</text:p>
          </table:table-cell>
          <table:table-cell table:style-name="ce58" table:number-matrix-columns-spanned="1" table:number-matrix-rows-spanned="1" table:formula="of:=MAX(COUNTIF([.C53:.L53]; [.C53:.L53]))" office:value-type="float" office:value="6" calcext:value-type="float">
            <text:p>6</text:p>
          </table:table-cell>
          <table:table-cell table:style-name="ce55"/>
          <table:table-cell table:style-name="ce58"/>
          <table:table-cell table:style-name="ce64" table:number-columns-repeated="10"/>
          <table:table-cell table:number-columns-repeated="998"/>
        </table:table-row>
        <table:table-row table:style-name="ro2">
          <table:table-cell table:style-name="ce29"/>
          <table:table-cell table:style-name="ce38"/>
          <table:table-cell table:style-name="ce29" table:number-columns-repeated="9"/>
          <table:table-cell table:style-name="ce49"/>
          <table:table-cell table:style-name="ce29" table:number-columns-repeated="2"/>
          <table:table-cell table:style-name="ce60"/>
          <table:table-cell table:style-name="ce62"/>
          <table:table-cell table:style-name="ce29" table:number-columns-repeated="10"/>
          <table:table-cell table:number-columns-repeated="998"/>
        </table:table-row>
        <table:table-row table:style-name="ro2">
          <table:table-cell/>
          <table:table-cell table:style-name="ce38"/>
          <table:table-cell table:style-name="ce41" table:number-matrix-columns-spanned="1" table:number-matrix-rows-spanned="1" table:formula="of:=INDEX([.C4:.C53]; MATCH(MAX(COUNTIF([.C4:.C53]; [.C4:.C53])); COUNTIF([.C4:.C53]; [.C4:.C53]); 0))" office:value-type="string" office:string-value="Deepseek" calcext:value-type="string">
            <text:p>Deepseek</text:p>
          </table:table-cell>
          <table:table-cell table:style-name="ce41" table:number-matrix-columns-spanned="1" table:number-matrix-rows-spanned="1" table:formula="of:=INDEX([.D4:.D53]; MATCH(MAX(COUNTIF([.D4:.D53]; [.D4:.D53])); COUNTIF([.D4:.D53]; [.D4:.D53]); 0))" office:value-type="string" office:string-value="Claude" calcext:value-type="string">
            <text:p>Claude</text:p>
          </table:table-cell>
          <table:table-cell table:style-name="ce41" table:number-matrix-columns-spanned="1" table:number-matrix-rows-spanned="1" table:formula="of:=INDEX([.E4:.E53]; MATCH(MAX(COUNTIF([.E4:.E53]; [.E4:.E53])); COUNTIF([.E4:.E53]; [.E4:.E53]); 0))" office:value-type="string" office:string-value="Claude" calcext:value-type="string">
            <text:p>Claude</text:p>
          </table:table-cell>
          <table:table-cell table:style-name="ce41" table:number-matrix-columns-spanned="1" table:number-matrix-rows-spanned="1" table:formula="of:=INDEX([.F4:.F53]; MATCH(MAX(COUNTIF([.F4:.F53]; [.F4:.F53])); COUNTIF([.F4:.F53]; [.F4:.F53]); 0))" office:value-type="string" office:string-value="Claude" calcext:value-type="string">
            <text:p>Claude</text:p>
          </table:table-cell>
          <table:table-cell table:style-name="ce41" table:number-matrix-columns-spanned="1" table:number-matrix-rows-spanned="1" table:formula="of:=INDEX([.G4:.G53]; MATCH(MAX(COUNTIF([.G4:.G53]; [.G4:.G53])); COUNTIF([.G4:.G53]; [.G4:.G53]); 0))" office:value-type="string" office:string-value="Claude" calcext:value-type="string">
            <text:p>Claude</text:p>
          </table:table-cell>
          <table:table-cell table:style-name="ce41" table:number-matrix-columns-spanned="1" table:number-matrix-rows-spanned="1" table:formula="of:=INDEX([.H4:.H53]; MATCH(MAX(COUNTIF([.H4:.H53]; [.H4:.H53])); COUNTIF([.H4:.H53]; [.H4:.H53]); 0))" office:value-type="string" office:string-value="Claude" calcext:value-type="string">
            <text:p>Claude</text:p>
          </table:table-cell>
          <table:table-cell table:style-name="ce41" table:number-matrix-columns-spanned="1" table:number-matrix-rows-spanned="1" table:formula="of:=INDEX([.I4:.I53]; MATCH(MAX(COUNTIF([.I4:.I53]; [.I4:.I53])); COUNTIF([.I4:.I53]; [.I4:.I53]); 0))" office:value-type="string" office:string-value="Claude" calcext:value-type="string">
            <text:p>Claude</text:p>
          </table:table-cell>
          <table:table-cell table:style-name="ce41" table:number-matrix-columns-spanned="1" table:number-matrix-rows-spanned="1" table:formula="of:=INDEX([.J4:.J53]; MATCH(MAX(COUNTIF([.J4:.J53]; [.J4:.J53])); COUNTIF([.J4:.J53]; [.J4:.J53]); 0))" office:value-type="string" office:string-value="Claude" calcext:value-type="string">
            <text:p>Claude</text:p>
          </table:table-cell>
          <table:table-cell table:style-name="ce41" table:number-matrix-columns-spanned="1" table:number-matrix-rows-spanned="1" table:formula="of:=INDEX([.K4:.K53]; MATCH(MAX(COUNTIF([.K4:.K53]; [.K4:.K53])); COUNTIF([.K4:.K53]; [.K4:.K53]); 0))" office:value-type="string" office:string-value="Claude" calcext:value-type="string">
            <text:p>Claude</text:p>
          </table:table-cell>
          <table:table-cell table:style-name="ce50" table:number-matrix-columns-spanned="1" table:number-matrix-rows-spanned="1" table:formula="of:=INDEX([.L4:.L53]; MATCH(MAX(COUNTIF([.L4:.L53]; [.L4:.L53])); COUNTIF([.L4:.L53]; [.L4:.L53]); 0))" office:value-type="string" office:string-value="Claude" calcext:value-type="string">
            <text:p>Claude</text:p>
          </table:table-cell>
          <table:table-cell table:number-columns-repeated="2"/>
          <table:table-cell table:style-name="ce53"/>
          <table:table-cell table:style-name="ce56"/>
          <table:table-cell table:number-columns-repeated="1008"/>
        </table:table-row>
        <table:table-row table:style-name="ro2">
          <table:table-cell/>
          <table:table-cell table:style-name="ce38"/>
          <table:table-cell table:style-name="ce41" table:number-matrix-columns-spanned="1" table:number-matrix-rows-spanned="1" table:formula="of:=MAX(COUNTIF([.C4:.C53]; [.C4:.C53]))" office:value-type="float" office:value="18" calcext:value-type="float">
            <text:p>18</text:p>
          </table:table-cell>
          <table:table-cell table:style-name="ce41" table:number-matrix-columns-spanned="1" table:number-matrix-rows-spanned="1" table:formula="of:=MAX(COUNTIF([.D4:.D53]; [.D4:.D53]))" office:value-type="float" office:value="36" calcext:value-type="float">
            <text:p>36</text:p>
          </table:table-cell>
          <table:table-cell table:style-name="ce41" table:number-matrix-columns-spanned="1" table:number-matrix-rows-spanned="1" table:formula="of:=MAX(COUNTIF([.E4:.E53]; [.E4:.E53]))" office:value-type="float" office:value="19" calcext:value-type="float">
            <text:p>19</text:p>
          </table:table-cell>
          <table:table-cell table:style-name="ce41" table:number-matrix-columns-spanned="1" table:number-matrix-rows-spanned="1" table:formula="of:=MAX(COUNTIF([.F4:.F53]; [.F4:.F53]))" office:value-type="float" office:value="31" calcext:value-type="float">
            <text:p>31</text:p>
          </table:table-cell>
          <table:table-cell table:style-name="ce41" table:number-matrix-columns-spanned="1" table:number-matrix-rows-spanned="1" table:formula="of:=MAX(COUNTIF([.G4:.G53]; [.G4:.G53]))" office:value-type="float" office:value="21" calcext:value-type="float">
            <text:p>21</text:p>
          </table:table-cell>
          <table:table-cell table:style-name="ce41" table:number-matrix-columns-spanned="1" table:number-matrix-rows-spanned="1" table:formula="of:=MAX(COUNTIF([.H4:.H53]; [.H4:.H53]))" office:value-type="float" office:value="40" calcext:value-type="float">
            <text:p>40</text:p>
          </table:table-cell>
          <table:table-cell table:style-name="ce41" table:number-matrix-columns-spanned="1" table:number-matrix-rows-spanned="1" table:formula="of:=MAX(COUNTIF([.I4:.I53]; [.I4:.I53]))" office:value-type="float" office:value="31" calcext:value-type="float">
            <text:p>31</text:p>
          </table:table-cell>
          <table:table-cell table:style-name="ce41" table:number-matrix-columns-spanned="1" table:number-matrix-rows-spanned="1" table:formula="of:=MAX(COUNTIF([.J4:.J53]; [.J4:.J53]))" office:value-type="float" office:value="25" calcext:value-type="float">
            <text:p>25</text:p>
          </table:table-cell>
          <table:table-cell table:style-name="ce41" table:number-matrix-columns-spanned="1" table:number-matrix-rows-spanned="1" table:formula="of:=MAX(COUNTIF([.K4:.K53]; [.K4:.K53]))" office:value-type="float" office:value="35" calcext:value-type="float">
            <text:p>35</text:p>
          </table:table-cell>
          <table:table-cell table:style-name="ce50" table:number-matrix-columns-spanned="1" table:number-matrix-rows-spanned="1" table:formula="of:=MAX(COUNTIF([.L4:.L53]; [.L4:.L53]))" office:value-type="float" office:value="22" calcext:value-type="float">
            <text:p>22</text:p>
          </table:table-cell>
          <table:table-cell table:number-columns-repeated="2"/>
          <table:table-cell table:style-name="ce53"/>
          <table:table-cell table:style-name="ce56"/>
          <table:table-cell table:number-columns-repeated="1008"/>
        </table:table-row>
        <table:table-row table:style-name="ro2" table:number-rows-repeated="944">
          <table:table-cell/>
          <table:table-cell table:style-name="ce38"/>
          <table:table-cell table:number-columns-repeated="9"/>
          <table:table-cell table:style-name="ce51"/>
          <table:table-cell table:number-columns-repeated="2"/>
          <table:table-cell table:style-name="ce53"/>
          <table:table-cell table:style-name="ce56"/>
          <table:table-cell table:number-columns-repeated="100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mpt1" table:style-name="ta3">
        <table:table-column table:style-name="co9" table:default-cell-style-name="Default"/>
        <table:table-column table:style-name="co8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8" table:number-columns-repeated="1013" table:default-cell-style-name="Default"/>
        <table:table-row table:style-name="ro2">
          <table:table-cell table:style-name="ce65" office:value-type="string" calcext:value-type="string">
            <text:p>Regra</text:p>
          </table:table-cell>
          <table:table-cell table:style-name="ce65" office:value-type="string" calcext:value-type="string">
            <text:p>num</text:p>
          </table:table-cell>
          <table:table-cell table:style-name="ce70" office:value-type="string" calcext:value-type="string" table:number-columns-spanned="1" table:number-rows-spanned="2">
            <text:p>CHATGPT</text:p>
          </table:table-cell>
          <table:table-cell table:style-name="ce70" office:value-type="string" calcext:value-type="string" table:number-columns-spanned="1" table:number-rows-spanned="2">
            <text:p>GEMINI</text:p>
          </table:table-cell>
          <table:table-cell table:style-name="ce70" office:value-type="string" calcext:value-type="string" table:number-columns-spanned="1" table:number-rows-spanned="2">
            <text:p>CLAUDE</text:p>
          </table:table-cell>
          <table:table-cell table:style-name="ce70" office:value-type="string" calcext:value-type="string" table:number-columns-spanned="1" table:number-rows-spanned="2">
            <text:p>DEEPSEEK</text:p>
          </table:table-cell>
          <table:table-cell table:style-name="ce75" office:value-type="string" calcext:value-type="string" table:number-columns-spanned="1" table:number-rows-spanned="2">
            <text:p>COPILOT</text:p>
          </table:table-cell>
          <table:table-cell table:style-name="ce79"/>
          <table:table-cell table:style-name="ce81"/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65" table:number-columns-repeated="2"/>
          <table:covered-table-cell table:number-columns-repeated="4"/>
          <table:covered-table-cell table:style-name="ce43"/>
          <table:table-cell table:style-name="ce79"/>
          <table:table-cell table:style-name="ce81"/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65" table:number-columns-repeated="2"/>
          <table:table-cell table:number-columns-repeated="4" table:style-name="ce71" office:value-type="string" calcext:value-type="string">
            <text:p>prompt 1</text:p>
          </table:table-cell>
          <table:table-cell table:style-name="ce75" office:value-type="string" calcext:value-type="string">
            <text:p>prompt 1</text:p>
          </table:table-cell>
          <table:table-cell table:style-name="ce79"/>
          <table:table-cell table:style-name="ce81"/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bitbucket_audit_unauthorized_full_data_export_triggered</text:p>
          </table:table-cell>
          <table:table-cell table:style-name="ce65" office:value-type="float" office:value="1" calcext:value-type="float">
            <text:p>1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ChatGPT</text:p>
          </table:table-cell>
          <table:table-cell table:style-name="ce76" office:value-type="string" calcext:value-type="string">
            <text:p>Deepseek</text:p>
          </table:table-cell>
          <table:table-cell table:style-name="ce79" table:number-matrix-columns-spanned="1" table:number-matrix-rows-spanned="1" table:formula="of:=INDEX([.C4:.G4]; MATCH(MAX(COUNTIF([.C4:.G4]; [.C4:.G4])); COUNTIF([.C4:.G4]; [.C4:.G4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4:.G4]; [.C4:.G4]))" office:value-type="float" office:value="2" calcext:value-type="float">
            <text:p>2</text:p>
          </table:table-cell>
          <table:table-cell table:style-name="ce79" office:value-type="string" calcext:value-type="string">
            <text:p>ChatGPT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31" office:value-type="string" calcext:value-type="string">
            <text:p>azure_app_device_code_authentication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5:.G5]; MATCH(MAX(COUNTIF([.C5:.G5]; [.C5:.G5])); COUNTIF([.C5:.G5]; [.C5:.G5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5:.G5]; [.C5:.G5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zeek_susp_kerberos_rc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Gemini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6:.G6]; MATCH(MAX(COUNTIF([.C6:.G6]; [.C6:.G6])); COUNTIF([.C6:.G6]; [.C6:.G6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6:.G6]; [.C6:.G6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osh_ps_modify_group_policy_settings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7:.G7]; MATCH(MAX(COUNTIF([.C7:.G7]; [.C7:.G7])); COUNTIF([.C7:.G7]; [.C7:.G7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7:.G7]; [.C7:.G7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win_firewall_as_add_rule_wmiprvse</text:p>
          </table:table-cell>
          <table:table-cell table:style-name="ce65" office:value-type="float" office:value="5" calcext:value-type="float">
            <text:p>5</text:p>
          </table:table-cell>
          <table:table-cell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ChatGPT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8:.G8]; MATCH(MAX(COUNTIF([.C8:.G8]; [.C8:.G8])); COUNTIF([.C8:.G8]; [.C8:.G8]); 0))" office:value-type="string" office:string-value="ChatGPT" calcext:value-type="string">
            <text:p>ChatGPT</text:p>
          </table:table-cell>
          <table:table-cell table:style-name="ce81" table:number-matrix-columns-spanned="1" table:number-matrix-rows-spanned="1" table:formula="of:=MAX(COUNTIF([.C8:.G8]; [.C8:.G8]))" office:value-type="float" office:value="2" calcext:value-type="float">
            <text:p>2</text:p>
          </table:table-cell>
          <table:table-cell table:style-name="ce79" office:value-type="string" calcext:value-type="string">
            <text:p>Claude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31" office:value-type="string" calcext:value-type="string">
            <text:p>huawei_bgp_auth_failed</text:p>
          </table:table-cell>
          <table:table-cell table:style-name="ce65" office:value-type="float" office:value="6" calcext:value-type="float">
            <text:p>6</text:p>
          </table:table-cell>
          <table:table-cell table:style-name="ce72" office:value-type="string" calcext:value-type="string">
            <text:p>Gemini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9:.G9]; MATCH(MAX(COUNTIF([.C9:.G9]; [.C9:.G9])); COUNTIF([.C9:.G9]; [.C9:.G9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9:.G9]; [.C9:.G9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rpc_firewall_printing_lateral_movement</text:p>
          </table:table-cell>
          <table:table-cell table:style-name="ce65" office:value-type="float" office:value="7" calcext:value-type="float">
            <text:p>7</text:p>
          </table:table-cell>
          <table:table-cell table:style-name="ce72" office:value-type="string" calcext:value-type="string">
            <text:p>Gemini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6" office:value-type="string" calcext:value-type="string">
            <text:p>Deepseek</text:p>
          </table:table-cell>
          <table:table-cell table:style-name="ce79" table:number-matrix-columns-spanned="1" table:number-matrix-rows-spanned="1" table:formula="of:=INDEX([.C10:.G10]; MATCH(MAX(COUNTIF([.C10:.G10]; [.C10:.G10])); COUNTIF([.C10:.G10]; [.C10:.G10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0:.G10]; [.C10:.G10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registry_set_change_security_zones</text:p>
          </table:table-cell>
          <table:table-cell table:style-name="ce65" office:value-type="float" office:value="8" calcext:value-type="float">
            <text:p>8</text:p>
          </table:table-cell>
          <table:table-cell table:style-name="ce72" office:value-type="string" calcext:value-type="string">
            <text:p>Deepseek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1:.G11]; MATCH(MAX(COUNTIF([.C11:.G11]; [.C11:.G11])); COUNTIF([.C11:.G11]; [.C11:.G11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1:.G11]; [.C11:.G11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3" office:value-type="string" calcext:value-type="string">
            <text:p>app_sqlinjection_errors</text:p>
          </table:table-cell>
          <table:table-cell table:style-name="ce68" office:value-type="float" office:value="9" calcext:value-type="float">
            <text:p>9</text:p>
          </table:table-cell>
          <table:table-cell table:number-columns-repeated="4" table:style-name="ce72" office:value-type="string" calcext:value-type="string">
            <text:p>ChatGPT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2:.G12]; MATCH(MAX(COUNTIF([.C12:.G12]; [.C12:.G12])); COUNTIF([.C12:.G12]; [.C12:.G12]); 0))" office:value-type="string" office:string-value="ChatGPT" calcext:value-type="string">
            <text:p>ChatGPT</text:p>
          </table:table-cell>
          <table:table-cell table:style-name="ce81" table:number-matrix-columns-spanned="1" table:number-matrix-rows-spanned="1" table:formula="of:=MAX(COUNTIF([.C12:.G12]; [.C12:.G12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db_anomalous_query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3:.G13]; MATCH(MAX(COUNTIF([.C13:.G13]; [.C13:.G13])); COUNTIF([.C13:.G13]; [.C13:.G13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3:.G13]; [.C13:.G13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delete_win_delete_exchange_powershell_logs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3" table:style-name="ce72" office:value-type="string" calcext:value-type="string">
            <text:p>ChatGPT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4:.G14]; MATCH(MAX(COUNTIF([.C14:.G14]; [.C14:.G14])); COUNTIF([.C14:.G14]; [.C14:.G14]); 0))" office:value-type="string" office:string-value="ChatGPT" calcext:value-type="string">
            <text:p>ChatGPT</text:p>
          </table:table-cell>
          <table:table-cell table:style-name="ce81" table:number-matrix-columns-spanned="1" table:number-matrix-rows-spanned="1" table:formula="of:=MAX(COUNTIF([.C14:.G14]; [.C14:.G14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net_dns_katz_stealer_domain</text:p>
          </table:table-cell>
          <table:table-cell table:style-name="ce65" office:value-type="float" office:value="12" calcext:value-type="float">
            <text:p>12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Gemini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5:.G15]; MATCH(MAX(COUNTIF([.C15:.G15]; [.C15:.G15])); COUNTIF([.C15:.G15]; [.C15:.G15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5:.G15]; [.C15:.G15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opencanary_ssh_login_attempt</text:p>
          </table:table-cell>
          <table:table-cell table:style-name="ce65" office:value-type="float" office:value="13" calcext:value-type="float">
            <text:p>13</text:p>
          </table:table-cell>
          <table:table-cell table:style-name="ce72" office:value-type="string" calcext:value-type="string">
            <text:p>NONE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16:.G16]; MATCH(MAX(COUNTIF([.C16:.G16]; [.C16:.G16])); COUNTIF([.C16:.G16]; [.C16:.G16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6:.G16]; [.C16:.G16]))" office:value-type="float" office:value="2" calcext:value-type="float">
            <text:p>2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roxy_exploit_cve_2023_1389_unauth_command_injection_tplink_archer_ax21</text:p>
          </table:table-cell>
          <table:table-cell table:style-name="ce65" office:value-type="float" office:value="14" calcext:value-type="float">
            <text:p>14</text:p>
          </table:table-cell>
          <table:table-cell table:number-columns-repeated="3" table:style-name="ce72" office:value-type="string" calcext:value-type="string">
            <text:p>Deepseek</text:p>
          </table:table-cell>
          <table:table-cell table:style-name="ce72" office:value-type="string" calcext:value-type="string">
            <text:p>ChatGPT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7:.G17]; MATCH(MAX(COUNTIF([.C17:.G17]; [.C17:.G17])); COUNTIF([.C17:.G17]; [.C17:.G17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17:.G17]; [.C17:.G17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registry_event_runkey_winekey</text:p>
          </table:table-cell>
          <table:table-cell table:style-name="ce65" office:value-type="float" office:value="15" calcext:value-type="float">
            <text:p>15</text:p>
          </table:table-cell>
          <table:table-cell table:style-name="ce72" office:value-type="string" calcext:value-type="string">
            <text:p>Claude</text:p>
          </table:table-cell>
          <table:table-cell table:number-columns-repeated="2" table:style-name="ce72" office:value-type="string" calcext:value-type="string">
            <text:p>ChatGPT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8:.G18]; MATCH(MAX(COUNTIF([.C18:.G18]; [.C18:.G18])); COUNTIF([.C18:.G18]; [.C18:.G18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8:.G18]; [.C18:.G18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appframework_django_exceptions</text:p>
          </table:table-cell>
          <table:table-cell table:style-name="ce65" office:value-type="float" office:value="16" calcext:value-type="float">
            <text:p>16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9:.G19]; MATCH(MAX(COUNTIF([.C19:.G19]; [.C19:.G19])); COUNTIF([.C19:.G19]; [.C19:.G19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9:.G19]; [.C19:.G19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github_delete_action_invoked</text:p>
          </table:table-cell>
          <table:table-cell table:style-name="ce65" office:value-type="float" office:value="17" calcext:value-type="float">
            <text:p>17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20:.G20]; MATCH(MAX(COUNTIF([.C20:.G20]; [.C20:.G20])); COUNTIF([.C20:.G20]; [.C20:.G20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0:.G20]; [.C20:.G20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java_local_file_read</text:p>
          </table:table-cell>
          <table:table-cell table:style-name="ce65" office:value-type="float" office:value="18" calcext:value-type="float">
            <text:p>18</text:p>
          </table:table-cell>
          <table:table-cell table:style-name="ce72" office:value-type="string" calcext:value-type="string">
            <text:p>Copilot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21:.G21]; MATCH(MAX(COUNTIF([.C21:.G21]; [.C21:.G21])); COUNTIF([.C21:.G21]; [.C21:.G21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1:.G21]; [.C21:.G21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kubernetes_audit_exec_into_container</text:p>
          </table:table-cell>
          <table:table-cell table:style-name="ce65" office:value-type="float" office:value="19" calcext:value-type="float">
            <text:p>19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Gemini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22:.G22]; MATCH(MAX(COUNTIF([.C22:.G22]; [.C22:.G22])); COUNTIF([.C22:.G22]; [.C22:.G22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2:.G22]; [.C22:.G22]))" office:value-type="float" office:value="2" calcext:value-type="float">
            <text:p>2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kubernetes_audit_secrets_modified_or_deleted</text:p>
          </table:table-cell>
          <table:table-cell table:style-name="ce65" office:value-type="float" office:value="20" calcext:value-type="float">
            <text:p>20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23:.G23]; MATCH(MAX(COUNTIF([.C23:.G23]; [.C23:.G23])); COUNTIF([.C23:.G23]; [.C23:.G23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3:.G23]; [.C23:.G23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av_exploit_cve_2021_34527_print_nightmare</text:p>
          </table:table-cell>
          <table:table-cell table:style-name="ce65" office:value-type="float" office:value="21" calcext:value-type="float">
            <text:p>21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Gemini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24:.G24]; MATCH(MAX(COUNTIF([.C24:.G24]; [.C24:.G24])); COUNTIF([.C24:.G24]; [.C24:.G24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24:.G24]; [.C24:.G24]))" office:value-type="float" office:value="2" calcext:value-type="float">
            <text:p>2</text:p>
          </table:table-cell>
          <table:table-cell table:style-name="ce79" office:value-type="string" calcext:value-type="string">
            <text:p>Gemini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31" office:value-type="string" calcext:value-type="string">
            <text:p>microsoft365_new_federated_domain_added_audit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3"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Gemini</text:p>
          </table:table-cell>
          <table:table-cell table:style-name="ce79" table:number-matrix-columns-spanned="1" table:number-matrix-rows-spanned="1" table:formula="of:=INDEX([.C25:.G25]; MATCH(MAX(COUNTIF([.C25:.G25]; [.C25:.G25])); COUNTIF([.C25:.G25]; [.C25:.G25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25:.G25]; [.C25:.G25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win_appxdeployment_server_appx_downloaded_from_file_sharing_domains</text:p>
          </table:table-cell>
          <table:table-cell table:style-name="ce65" office:value-type="float" office:value="23" calcext:value-type="float">
            <text:p>23</text:p>
          </table:table-cell>
          <table:table-cell table:style-name="ce72" office:value-type="string" calcext:value-type="string">
            <text:p>Gemini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26:.G26]; MATCH(MAX(COUNTIF([.C26:.G26]; [.C26:.G26])); COUNTIF([.C26:.G26]; [.C26:.G26]); 0))" office:value-type="string" office:string-value="Gemini" calcext:value-type="string">
            <text:p>Gemini</text:p>
          </table:table-cell>
          <table:table-cell table:style-name="ce81" table:number-matrix-columns-spanned="1" table:number-matrix-rows-spanned="1" table:formula="of:=MAX(COUNTIF([.C26:.G26]; [.C26:.G26]))" office:value-type="float" office:value="2" calcext:value-type="float">
            <text:p>2</text:p>
          </table:table-cell>
          <table:table-cell table:style-name="ce79" office:value-type="string" calcext:value-type="string">
            <text:p>Claude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31" office:value-type="string" calcext:value-type="string">
            <text:p>file_event_lnx_doas_conf_creation</text:p>
          </table:table-cell>
          <table:table-cell table:style-name="ce65" office:value-type="float" office:value="24" calcext:value-type="float">
            <text:p>24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27:.G27]; MATCH(MAX(COUNTIF([.C27:.G27]; [.C27:.G27])); COUNTIF([.C27:.G27]; [.C27:.G27]); 0))" office:value-type="string" office:string-value="Gemini" calcext:value-type="string">
            <text:p>Gemini</text:p>
          </table:table-cell>
          <table:table-cell table:style-name="ce81" table:number-matrix-columns-spanned="1" table:number-matrix-rows-spanned="1" table:formula="of:=MAX(COUNTIF([.C27:.G27]; [.C27:.G27]))" office:value-type="float" office:value="2" calcext:value-type="float">
            <text:p>2</text:p>
          </table:table-cell>
          <table:table-cell table:style-name="ce79" office:value-type="string" calcext:value-type="string">
            <text:p>Claude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31" office:value-type="string" calcext:value-type="string">
            <text:p>posh_pm_invoke_obfuscation_stdin</text:p>
          </table:table-cell>
          <table:table-cell table:style-name="ce65" office:value-type="float" office:value="25" calcext:value-type="float">
            <text:p>25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28:.G28]; MATCH(MAX(COUNTIF([.C28:.G28]; [.C28:.G28])); COUNTIF([.C28:.G28]; [.C28:.G28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8:.G28]; [.C28:.G28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win_security_exploit_cve_2023_36884_office_windows_html_rce_share_access_pattern</text:p>
          </table:table-cell>
          <table:table-cell table:style-name="ce65" office:value-type="float" office:value="26" calcext:value-type="float">
            <text:p>26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Claude</text:p>
          </table:table-cell>
          <table:table-cell table:number-columns-repeated="2" table:style-name="ce72" office:value-type="string" calcext:value-type="string">
            <text:p>Gemini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29:.G29]; MATCH(MAX(COUNTIF([.C29:.G29]; [.C29:.G29])); COUNTIF([.C29:.G29]; [.C29:.G29]); 0))" office:value-type="string" office:string-value="Gemini" calcext:value-type="string">
            <text:p>Gemini</text:p>
          </table:table-cell>
          <table:table-cell table:style-name="ce81" table:number-matrix-columns-spanned="1" table:number-matrix-rows-spanned="1" table:formula="of:=MAX(COUNTIF([.C29:.G29]; [.C29:.G29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appframework_ruby_on_rails_exceptions</text:p>
          </table:table-cell>
          <table:table-cell table:style-name="ce65" office:value-type="float" office:value="27" calcext:value-type="float">
            <text:p>27</text:p>
          </table:table-cell>
          <table:table-cell table:number-columns-repeated="4" table:style-name="ce72" office:value-type="string" calcext:value-type="string">
            <text:p>Gemini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30:.G30]; MATCH(MAX(COUNTIF([.C30:.G30]; [.C30:.G30])); COUNTIF([.C30:.G30]; [.C30:.G30]); 0))" office:value-type="string" office:string-value="Gemini" calcext:value-type="string">
            <text:p>Gemini</text:p>
          </table:table-cell>
          <table:table-cell table:style-name="ce81" table:number-matrix-columns-spanned="1" table:number-matrix-rows-spanned="1" table:formula="of:=MAX(COUNTIF([.C30:.G30]; [.C30:.G30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ipe_created_sysinternals_psexec_default_pipe_susp_location</text:p>
          </table:table-cell>
          <table:table-cell table:style-name="ce65" office:value-type="float" office:value="28" calcext:value-type="float">
            <text:p>28</text:p>
          </table:table-cell>
          <table:table-cell table:number-columns-repeated="4" table:style-name="ce72" office:value-type="string" calcext:value-type="string">
            <text:p>ChatGPT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31:.G31]; MATCH(MAX(COUNTIF([.C31:.G31]; [.C31:.G31])); COUNTIF([.C31:.G31]; [.C31:.G31]); 0))" office:value-type="string" office:string-value="ChatGPT" calcext:value-type="string">
            <text:p>ChatGPT</text:p>
          </table:table-cell>
          <table:table-cell table:style-name="ce81" table:number-matrix-columns-spanned="1" table:number-matrix-rows-spanned="1" table:formula="of:=MAX(COUNTIF([.C31:.G31]; [.C31:.G31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event_win_susp_startup_folder_persistence</text:p>
          </table:table-cell>
          <table:table-cell table:style-name="ce65" office:value-type="float" office:value="29" calcext:value-type="float">
            <text:p>29</text:p>
          </table:table-cell>
          <table:table-cell table:number-columns-repeated="4" table:style-name="ce72" office:value-type="string" calcext:value-type="string">
            <text:p>Gemini</text:p>
          </table:table-cell>
          <table:table-cell table:style-name="ce76" office:value-type="string" calcext:value-type="string">
            <text:p>ChatGPT</text:p>
          </table:table-cell>
          <table:table-cell table:style-name="ce79" table:number-matrix-columns-spanned="1" table:number-matrix-rows-spanned="1" table:formula="of:=INDEX([.C32:.G32]; MATCH(MAX(COUNTIF([.C32:.G32]; [.C32:.G32])); COUNTIF([.C32:.G32]; [.C32:.G32]); 0))" office:value-type="string" office:string-value="Gemini" calcext:value-type="string">
            <text:p>Gemini</text:p>
          </table:table-cell>
          <table:table-cell table:style-name="ce81" table:number-matrix-columns-spanned="1" table:number-matrix-rows-spanned="1" table:formula="of:=MAX(COUNTIF([.C32:.G32]; [.C32:.G32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roc_creation_macos_remote_access_tools_meshagent_arguments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33:.G33]; MATCH(MAX(COUNTIF([.C33:.G33]; [.C33:.G33])); COUNTIF([.C33:.G33]; [.C33:.G33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33:.G33]; [.C33:.G33]))" office:value-type="float" office:value="5" calcext:value-type="float">
            <text:p>5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create_remote_thread_win_powershell_generic.yml</text:p>
          </table:table-cell>
          <table:table-cell table:style-name="ce65" office:value-type="float" office:value="31" calcext:value-type="float">
            <text:p>31</text:p>
          </table:table-cell>
          <table:table-cell table:number-columns-repeated="2" table:style-name="ce72" office:value-type="string" calcext:value-type="string">
            <text:p>Copilot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opilot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34:.G34]; MATCH(MAX(COUNTIF([.C34:.G34]; [.C34:.G34])); COUNTIF([.C34:.G34]; [.C34:.G34]); 0))" office:value-type="string" office:string-value="Copilot" calcext:value-type="string">
            <text:p>Copilot</text:p>
          </table:table-cell>
          <table:table-cell table:style-name="ce81" table:number-matrix-columns-spanned="1" table:number-matrix-rows-spanned="1" table:formula="of:=MAX(COUNTIF([.C34:.G34]; [.C34:.G34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image_load_susp_clickonce_unsigned_module_loaded</text:p>
          </table:table-cell>
          <table:table-cell table:style-name="ce65" office:value-type="float" office:value="32" calcext:value-type="float">
            <text:p>32</text:p>
          </table:table-cell>
          <table:table-cell table:style-name="ce72" office:value-type="string" calcext:value-type="string">
            <text:p>Copilot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opilot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35:.G35]; MATCH(MAX(COUNTIF([.C35:.G35]; [.C35:.G35])); COUNTIF([.C35:.G35]; [.C35:.G35]); 0))" office:value-type="string" office:string-value="Copilot" calcext:value-type="string">
            <text:p>Copilot</text:p>
          </table:table-cell>
          <table:table-cell table:style-name="ce81" table:number-matrix-columns-spanned="1" table:number-matrix-rows-spanned="1" table:formula="of:=MAX(COUNTIF([.C35:.G35]; [.C35:.G35]))" office:value-type="float" office:value="2" calcext:value-type="float">
            <text:p>2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web_sql_injection_in_access_logs</text:p>
          </table:table-cell>
          <table:table-cell table:style-name="ce65" office:value-type="float" office:value="33" calcext:value-type="float">
            <text:p>33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hatGPT</text:p>
          </table:table-cell>
          <table:table-cell table:style-name="ce79" table:number-matrix-columns-spanned="1" table:number-matrix-rows-spanned="1" table:formula="of:=INDEX([.C36:.G36]; MATCH(MAX(COUNTIF([.C36:.G36]; [.C36:.G36])); COUNTIF([.C36:.G36]; [.C36:.G36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36:.G36]; [.C36:.G36]))" office:value-type="float" office:value="2" calcext:value-type="float">
            <text:p>2</text:p>
          </table:table-cell>
          <table:table-cell table:style-name="ce79" office:value-type="string" calcext:value-type="string">
            <text:p>ChatGPT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31" office:value-type="string" calcext:value-type="string">
            <text:p>proc_creation_lnx_mal_shai_hulud_indicator</text:p>
          </table:table-cell>
          <table:table-cell table:style-name="ce65" office:value-type="float" office:value="34" calcext:value-type="float">
            <text:p>34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37:.G37]; MATCH(MAX(COUNTIF([.C37:.G37]; [.C37:.G37])); COUNTIF([.C37:.G37]; [.C37:.G37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37:.G37]; [.C37:.G37]))" office:value-type="float" office:value="2" calcext:value-type="float">
            <text:p>2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zeek_http_executable_download_from_webdav</text:p>
          </table:table-cell>
          <table:table-cell table:style-name="ce65" office:value-type="float" office:value="35" calcext:value-type="float">
            <text:p>35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38:.G38]; MATCH(MAX(COUNTIF([.C38:.G38]; [.C38:.G38])); COUNTIF([.C38:.G38]; [.C38:.G38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38:.G38]; [.C38:.G38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event_win_malware_darkgate_autoit3_save_temp</text:p>
          </table:table-cell>
          <table:table-cell table:style-name="ce65" office:value-type="float" office:value="36" calcext:value-type="float">
            <text:p>36</text:p>
          </table:table-cell>
          <table:table-cell table:style-name="ce72" office:value-type="string" calcext:value-type="string">
            <text:p>NONE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Deepseek</text:p>
          </table:table-cell>
          <table:table-cell table:style-name="ce79" table:number-matrix-columns-spanned="1" table:number-matrix-rows-spanned="1" table:formula="of:=INDEX([.C39:.G39]; MATCH(MAX(COUNTIF([.C39:.G39]; [.C39:.G39])); COUNTIF([.C39:.G39]; [.C39:.G39]); 0))" office:value-type="string" office:string-value="NONE" calcext:value-type="string">
            <text:p>NONE</text:p>
          </table:table-cell>
          <table:table-cell table:style-name="ce81" table:number-matrix-columns-spanned="1" table:number-matrix-rows-spanned="1" table:formula="of:=MAX(COUNTIF([.C39:.G39]; [.C39:.G39]))" office:value-type="float" office:value="1" calcext:value-type="float">
            <text:p>1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nodejs_rce_exploitation_attempt</text:p>
          </table:table-cell>
          <table:table-cell table:style-name="ce65" office:value-type="float" office:value="37" calcext:value-type="float">
            <text:p>37</text:p>
          </table:table-cell>
          <table:table-cell table:style-name="ce72" office:value-type="string" calcext:value-type="string">
            <text:p>NONE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Deepseek</text:p>
          </table:table-cell>
          <table:table-cell table:style-name="ce76" office:value-type="string" calcext:value-type="string">
            <text:p>ChatGPT</text:p>
          </table:table-cell>
          <table:table-cell table:style-name="ce79" table:number-matrix-columns-spanned="1" table:number-matrix-rows-spanned="1" table:formula="of:=INDEX([.C40:.G40]; MATCH(MAX(COUNTIF([.C40:.G40]; [.C40:.G40])); COUNTIF([.C40:.G40]; [.C40:.G40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40:.G40]; [.C40:.G40]))" office:value-type="float" office:value="2" calcext:value-type="float">
            <text:p>2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roc_creation_win_reg_query_registry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 table:style-name="ce72" office:value-type="string" calcext:value-type="string">
            <text:p>Deepseek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41:.G41]; MATCH(MAX(COUNTIF([.C41:.G41]; [.C41:.G41])); COUNTIF([.C41:.G41]; [.C41:.G41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41:.G41]; [.C41:.G41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app_python_sql_exceptions</text:p>
          </table:table-cell>
          <table:table-cell table:style-name="ce65" office:value-type="float" office:value="39" calcext:value-type="float">
            <text:p>39</text:p>
          </table:table-cell>
          <table:table-cell table:number-columns-repeated="4" table:style-name="ce72" office:value-type="string" calcext:value-type="string">
            <text:p>Deepseek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42:.G42]; MATCH(MAX(COUNTIF([.C42:.G42]; [.C42:.G42])); COUNTIF([.C42:.G42]; [.C42:.G42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42:.G42]; [.C42:.G42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event_macos_python_path_configuration_files</text:p>
          </table:table-cell>
          <table:table-cell table:style-name="ce65" office:value-type="float" office:value="40" calcext:value-type="float">
            <text:p>40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43:.G43]; MATCH(MAX(COUNTIF([.C43:.G43]; [.C43:.G43])); COUNTIF([.C43:.G43]; [.C43:.G43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3:.G43]; [.C43:.G43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spring_application_exceptions</text:p>
          </table:table-cell>
          <table:table-cell table:style-name="ce65" office:value-type="float" office:value="41" calcext:value-type="float">
            <text:p>41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hatGPT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44:.G44]; MATCH(MAX(COUNTIF([.C44:.G44]; [.C44:.G44])); COUNTIF([.C44:.G44]; [.C44:.G44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44:.G44]; [.C44:.G44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okta_policy_rule_modified_or_deleted</text:p>
          </table:table-cell>
          <table:table-cell table:style-name="ce65" office:value-type="float" office:value="42" calcext:value-type="float">
            <text:p>42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45:.G45]; MATCH(MAX(COUNTIF([.C45:.G45]; [.C45:.G45])); COUNTIF([.C45:.G45]; [.C45:.G45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5:.G45]; [.C45:.G45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cisco_duo_mfa_bypass_via_bypass_code</text:p>
          </table:table-cell>
          <table:table-cell table:style-name="ce65" office:value-type="float" office:value="43" calcext:value-type="float">
            <text:p>43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46:.G46]; MATCH(MAX(COUNTIF([.C46:.G46]; [.C46:.G46])); COUNTIF([.C46:.G46]; [.C46:.G46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6:.G46]; [.C46:.G46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rename_win_non_dll_to_dll_ext</text:p>
          </table:table-cell>
          <table:table-cell table:style-name="ce65" office:value-type="float" office:value="44" calcext:value-type="float">
            <text:p>44</text:p>
          </table:table-cell>
          <table:table-cell table:style-name="ce72" office:value-type="string" calcext:value-type="string">
            <text:p>NONE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47:.G47]; MATCH(MAX(COUNTIF([.C47:.G47]; [.C47:.G47])); COUNTIF([.C47:.G47]; [.C47:.G47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7:.G47]; [.C47:.G47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net_connection_win_silenttrinity_stager_msbuild_activity</text:p>
          </table:table-cell>
          <table:table-cell table:style-name="ce65" office:value-type="float" office:value="45" calcext:value-type="float">
            <text:p>45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48:.G48]; MATCH(MAX(COUNTIF([.C48:.G48]; [.C48:.G48])); COUNTIF([.C48:.G48]; [.C48:.G48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8:.G48]; [.C48:.G48]))" office:value-type="float" office:value="5" calcext:value-type="float">
            <text:p>5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osh_pm_alternate_powershell_hosts</text:p>
          </table:table-cell>
          <table:table-cell table:style-name="ce65" office:value-type="float" office:value="46" calcext:value-type="float">
            <text:p>46</text:p>
          </table:table-cell>
          <table:table-cell table:style-name="ce72" office:value-type="string" calcext:value-type="string">
            <text:p>NONE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49:.G49]; MATCH(MAX(COUNTIF([.C49:.G49]; [.C49:.G49])); COUNTIF([.C49:.G49]; [.C49:.G49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9:.G49]; [.C49:.G49]))" office:value-type="float" office:value="2" calcext:value-type="float">
            <text:p>2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roc_access_win_lsass_susp_access_flag</text:p>
          </table:table-cell>
          <table:table-cell table:style-name="ce65" office:value-type="float" office:value="47" calcext:value-type="float">
            <text:p>47</text:p>
          </table:table-cell>
          <table:table-cell table:style-name="ce72" office:value-type="string" calcext:value-type="string">
            <text:p>Gemini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6" office:value-type="string" calcext:value-type="string">
            <text:p>ChatGPT</text:p>
          </table:table-cell>
          <table:table-cell table:style-name="ce79" table:number-matrix-columns-spanned="1" table:number-matrix-rows-spanned="1" table:formula="of:=INDEX([.C50:.G50]; MATCH(MAX(COUNTIF([.C50:.G50]; [.C50:.G50])); COUNTIF([.C50:.G50]; [.C50:.G50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50:.G50]; [.C50:.G50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velocity_ssti_injection</text:p>
          </table:table-cell>
          <table:table-cell table:style-name="ce65" office:value-type="float" office:value="48" calcext:value-type="float">
            <text:p>48</text:p>
          </table:table-cell>
          <table:table-cell table:style-name="ce72" office:value-type="string" calcext:value-type="string">
            <text:p>Gemini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51:.G51]; MATCH(MAX(COUNTIF([.C51:.G51]; [.C51:.G51])); COUNTIF([.C51:.G51]; [.C51:.G51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51:.G51]; [.C51:.G51]))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zeek_dce_rpc_mitre_bzar_persistence</text:p>
          </table:table-cell>
          <table:table-cell table:style-name="ce65" office:value-type="float" office:value="49" calcext:value-type="float">
            <text:p>49</text:p>
          </table:table-cell>
          <table:table-cell table:style-name="ce72" office:value-type="string" calcext:value-type="string">
            <text:p>ChatGPT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52:.G52]; MATCH(MAX(COUNTIF([.C52:.G52]; [.C52:.G52])); COUNTIF([.C52:.G52]; [.C52:.G52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52:.G52]; [.C52:.G52]))" office:value-type="float" office:value="4" calcext:value-type="float">
            <text:p>4</text:p>
          </table:table-cell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66" office:value-type="string" calcext:value-type="string">
            <text:p>net_dns_susp_telegram_api</text:p>
          </table:table-cell>
          <table:table-cell table:style-name="ce69" office:value-type="float" office:value="50" calcext:value-type="float">
            <text:p>50</text:p>
          </table:table-cell>
          <table:table-cell table:style-name="ce73" office:value-type="string" calcext:value-type="string">
            <text:p>Deepseek</text:p>
          </table:table-cell>
          <table:table-cell table:style-name="ce73" office:value-type="string" calcext:value-type="string">
            <text:p>Gemini</text:p>
          </table:table-cell>
          <table:table-cell table:style-name="ce73" office:value-type="string" calcext:value-type="string">
            <text:p>Deepseek</text:p>
          </table:table-cell>
          <table:table-cell table:style-name="ce73" office:value-type="string" calcext:value-type="string">
            <text:p>Claude</text:p>
          </table:table-cell>
          <table:table-cell table:style-name="ce77" office:value-type="string" calcext:value-type="string">
            <text:p>Claude</text:p>
          </table:table-cell>
          <table:table-cell table:style-name="ce80" table:number-matrix-columns-spanned="1" table:number-matrix-rows-spanned="1" table:formula="of:=INDEX([.C53:.G53]; MATCH(MAX(COUNTIF([.C53:.G53]; [.C53:.G53])); COUNTIF([.C53:.G53]; [.C53:.G53]); 0))" office:value-type="string" office:string-value="Deepseek" calcext:value-type="string">
            <text:p>Deepseek</text:p>
          </table:table-cell>
          <table:table-cell table:style-name="ce82" table:number-matrix-columns-spanned="1" table:number-matrix-rows-spanned="1" table:formula="of:=MAX(COUNTIF([.C53:.G53]; [.C53:.G53]))" office:value-type="float" office:value="2" calcext:value-type="float">
            <text:p>2</text:p>
          </table:table-cell>
          <table:table-cell table:style-name="ce80" office:value-type="string" calcext:value-type="string">
            <text:p>Claude</text:p>
          </table:table-cell>
          <table:table-cell table:style-name="ce82" office:value-type="float" office:value="2" calcext:value-type="float">
            <text:p>2</text:p>
          </table:table-cell>
          <table:table-cell table:style-name="ce83" table:number-columns-repeated="10"/>
          <table:table-cell table:number-columns-repeated="1003"/>
        </table:table-row>
        <table:table-row table:style-name="ro2">
          <table:table-cell/>
          <table:table-cell table:style-name="ce67"/>
          <table:table-cell table:style-name="ce74" table:number-columns-repeated="4"/>
          <table:table-cell table:style-name="ce78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67" table:number-columns-repeated="2"/>
          <table:table-cell table:style-name="ce71" table:number-matrix-columns-spanned="1" table:number-matrix-rows-spanned="1" table:formula="of:=INDEX([.C4:.C53]; MATCH(MAX(COUNTIF([.C4:.C53]; [.C4:.C53])); COUNTIF([.C4:.C53]; [.C4:.C53]); 0))" office:value-type="string" office:string-value="Deepseek" calcext:value-type="string">
            <text:p>Deepseek</text:p>
          </table:table-cell>
          <table:table-cell table:style-name="ce71" table:number-matrix-columns-spanned="1" table:number-matrix-rows-spanned="1" table:formula="of:=INDEX([.D4:.D53]; MATCH(MAX(COUNTIF([.D4:.D53]; [.D4:.D53])); COUNTIF([.D4:.D53]; [.D4:.D53]); 0))" office:value-type="string" office:string-value="Claude" calcext:value-type="string">
            <text:p>Claude</text:p>
          </table:table-cell>
          <table:table-cell table:style-name="ce71" table:number-matrix-columns-spanned="1" table:number-matrix-rows-spanned="1" table:formula="of:=INDEX([.E4:.E53]; MATCH(MAX(COUNTIF([.E4:.E53]; [.E4:.E53])); COUNTIF([.E4:.E53]; [.E4:.E53]); 0))" office:value-type="string" office:string-value="Claude" calcext:value-type="string">
            <text:p>Claude</text:p>
          </table:table-cell>
          <table:table-cell table:style-name="ce71" table:number-matrix-columns-spanned="1" table:number-matrix-rows-spanned="1" table:formula="of:=INDEX([.F4:.F53]; MATCH(MAX(COUNTIF([.F4:.F53]; [.F4:.F53])); COUNTIF([.F4:.F53]; [.F4:.F53]); 0))" office:value-type="string" office:string-value="Claude" calcext:value-type="string">
            <text:p>Claude</text:p>
          </table:table-cell>
          <table:table-cell table:style-name="ce75" table:number-matrix-columns-spanned="1" table:number-matrix-rows-spanned="1" table:formula="of:=INDEX([.G4:.G53]; MATCH(MAX(COUNTIF([.G4:.G53]; [.G4:.G53])); COUNTIF([.G4:.G53]; [.G4:.G53]); 0))" office:value-type="string" office:string-value="Claude" calcext:value-type="string">
            <text:p>Claude</text:p>
          </table:table-cell>
          <table:table-cell table:style-name="ce79"/>
          <table:table-cell table:style-name="ce81"/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67" table:number-columns-repeated="2"/>
          <table:table-cell table:style-name="ce71" table:number-matrix-columns-spanned="1" table:number-matrix-rows-spanned="1" table:formula="of:=MAX(COUNTIF([.C4:.C53]; [.C4:.C53]))" office:value-type="float" office:value="18" calcext:value-type="float">
            <text:p>18</text:p>
          </table:table-cell>
          <table:table-cell table:style-name="ce71" table:number-matrix-columns-spanned="1" table:number-matrix-rows-spanned="1" table:formula="of:=MAX(COUNTIF([.D4:.D53]; [.D4:.D53]))" office:value-type="float" office:value="19" calcext:value-type="float">
            <text:p>19</text:p>
          </table:table-cell>
          <table:table-cell table:style-name="ce71" table:number-matrix-columns-spanned="1" table:number-matrix-rows-spanned="1" table:formula="of:=MAX(COUNTIF([.E4:.E53]; [.E4:.E53]))" office:value-type="float" office:value="21" calcext:value-type="float">
            <text:p>21</text:p>
          </table:table-cell>
          <table:table-cell table:style-name="ce71" table:number-matrix-columns-spanned="1" table:number-matrix-rows-spanned="1" table:formula="of:=MAX(COUNTIF([.F4:.F53]; [.F4:.F53]))" office:value-type="float" office:value="31" calcext:value-type="float">
            <text:p>31</text:p>
          </table:table-cell>
          <table:table-cell table:style-name="ce75" table:number-matrix-columns-spanned="1" table:number-matrix-rows-spanned="1" table:formula="of:=MAX(COUNTIF([.G4:.G53]; [.G4:.G53]))" office:value-type="float" office:value="35" calcext:value-type="float">
            <text:p>35</text:p>
          </table:table-cell>
          <table:table-cell table:style-name="ce79"/>
          <table:table-cell table:style-name="ce81"/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 table:number-rows-repeated="944">
          <table:table-cell/>
          <table:table-cell table:style-name="ce67"/>
          <table:table-cell table:style-name="ce74" table:number-columns-repeated="4"/>
          <table:table-cell table:style-name="ce78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mpt2" table:style-name="ta4">
        <table:table-column table:style-name="co9" table:default-cell-style-name="Default"/>
        <table:table-column table:style-name="co8" table:number-columns-repeated="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1013" table:default-cell-style-name="Default"/>
        <table:table-row table:style-name="ro2">
          <table:table-cell table:style-name="ce65" office:value-type="string" calcext:value-type="string">
            <text:p>Regra</text:p>
          </table:table-cell>
          <table:table-cell table:style-name="ce65" office:value-type="string" calcext:value-type="string">
            <text:p>num</text:p>
          </table:table-cell>
          <table:table-cell table:style-name="ce70" office:value-type="string" calcext:value-type="string" table:number-columns-spanned="1" table:number-rows-spanned="2">
            <text:p>CHATGPT</text:p>
          </table:table-cell>
          <table:table-cell table:style-name="ce70" office:value-type="string" calcext:value-type="string" table:number-columns-spanned="1" table:number-rows-spanned="2">
            <text:p>GEMINI</text:p>
          </table:table-cell>
          <table:table-cell table:style-name="ce70" office:value-type="string" calcext:value-type="string" table:number-columns-spanned="1" table:number-rows-spanned="2">
            <text:p>CLAUDE</text:p>
          </table:table-cell>
          <table:table-cell table:style-name="ce70" office:value-type="string" calcext:value-type="string" table:number-columns-spanned="1" table:number-rows-spanned="2">
            <text:p>DEEPSEEK</text:p>
          </table:table-cell>
          <table:table-cell table:style-name="ce75" office:value-type="string" calcext:value-type="string" table:number-columns-spanned="1" table:number-rows-spanned="2">
            <text:p>COPILOT</text:p>
          </table:table-cell>
          <table:table-cell table:style-name="ce79"/>
          <table:table-cell table:style-name="ce81"/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65" table:number-columns-repeated="2"/>
          <table:covered-table-cell table:number-columns-repeated="4"/>
          <table:covered-table-cell table:style-name="ce43"/>
          <table:table-cell table:style-name="ce79"/>
          <table:table-cell table:style-name="ce81"/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/>
          <table:table-cell table:style-name="ce65"/>
          <table:table-cell table:number-columns-repeated="4" table:style-name="ce71" office:value-type="string" calcext:value-type="string">
            <text:p>prompt 2</text:p>
          </table:table-cell>
          <table:table-cell table:style-name="ce75" office:value-type="string" calcext:value-type="string">
            <text:p>prompt 2</text:p>
          </table:table-cell>
          <table:table-cell table:style-name="ce79"/>
          <table:table-cell table:style-name="ce81"/>
          <table:table-cell table:style-name="ce79"/>
          <table:table-cell table:style-name="ce81"/>
          <table:table-cell table:style-name="ce67"/>
          <table:table-cell table:number-columns-repeated="1012"/>
        </table:table-row>
        <table:table-row table:style-name="ro2">
          <table:table-cell table:style-name="ce31" office:value-type="string" calcext:value-type="string">
            <text:p>bitbucket_audit_unauthorized_full_data_export_triggered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4:.G4]; MATCH(MAX(COUNTIF([.C4:.G4]; [.C4:.G4])); COUNTIF([.C4:.G4]; [.C4:.G4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:.G4]; [.C4:.G4]))" office:value-type="float" office:value="5" calcext:value-type="float">
            <text:p>5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azure_app_device_code_authentication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5:.G5]; MATCH(MAX(COUNTIF([.C5:.G5]; [.C5:.G5])); COUNTIF([.C5:.G5]; [.C5:.G5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5:.G5]; [.C5:.G5]))" office:value-type="float" office:value="5" calcext:value-type="float">
            <text:p>5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zeek_susp_kerberos_rc4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6:.G6]; MATCH(MAX(COUNTIF([.C6:.G6]; [.C6:.G6])); COUNTIF([.C6:.G6]; [.C6:.G6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6:.G6]; [.C6:.G6]))" office:value-type="float" office:value="5" calcext:value-type="float">
            <text:p>5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posh_ps_modify_group_policy_settings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hatGPT</text:p>
          </table:table-cell>
          <table:table-cell table:style-name="ce79" table:number-matrix-columns-spanned="1" table:number-matrix-rows-spanned="1" table:formula="of:=INDEX([.C7:.G7]; MATCH(MAX(COUNTIF([.C7:.G7]; [.C7:.G7])); COUNTIF([.C7:.G7]; [.C7:.G7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7:.G7]; [.C7:.G7]))" office:value-type="float" office:value="4" calcext:value-type="float">
            <text:p>4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win_firewall_as_add_rule_wmiprvse</text:p>
          </table:table-cell>
          <table:table-cell table:style-name="ce65" office:value-type="float" office:value="5" calcext:value-type="float">
            <text:p>5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Gemini</text:p>
          </table:table-cell>
          <table:table-cell table:style-name="ce79" table:number-matrix-columns-spanned="1" table:number-matrix-rows-spanned="1" table:formula="of:=INDEX([.C8:.G8]; MATCH(MAX(COUNTIF([.C8:.G8]; [.C8:.G8])); COUNTIF([.C8:.G8]; [.C8:.G8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8:.G8]; [.C8:.G8]))" office:value-type="float" office:value="2" calcext:value-type="float">
            <text:p>2</text:p>
          </table:table-cell>
          <table:table-cell table:style-name="ce79" office:value-type="string" calcext:value-type="string">
            <text:p>Gemini</text:p>
          </table:table-cell>
          <table:table-cell table:style-name="ce81" office:value-type="float" office:value="2" calcext:value-type="float">
            <text:p>2</text:p>
          </table:table-cell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huawei_bgp_auth_failed</text:p>
          </table:table-cell>
          <table:table-cell table:style-name="ce65" office:value-type="float" office:value="6" calcext:value-type="float">
            <text:p>6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9:.G9]; MATCH(MAX(COUNTIF([.C9:.G9]; [.C9:.G9])); COUNTIF([.C9:.G9]; [.C9:.G9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9:.G9]; [.C9:.G9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rpc_firewall_printing_lateral_movement</text:p>
          </table:table-cell>
          <table:table-cell table:style-name="ce65" office:value-type="float" office:value="7" calcext:value-type="float">
            <text:p>7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0:.G10]; MATCH(MAX(COUNTIF([.C10:.G10]; [.C10:.G10])); COUNTIF([.C10:.G10]; [.C10:.G10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0:.G10]; [.C10:.G10]))" office:value-type="float" office:value="5" calcext:value-type="float">
            <text:p>5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registry_set_change_security_zones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style-name="ce76" office:value-type="string" calcext:value-type="string">
            <text:p>ChatGPT</text:p>
          </table:table-cell>
          <table:table-cell table:style-name="ce79" table:number-matrix-columns-spanned="1" table:number-matrix-rows-spanned="1" table:formula="of:=INDEX([.C11:.G11]; MATCH(MAX(COUNTIF([.C11:.G11]; [.C11:.G11])); COUNTIF([.C11:.G11]; [.C11:.G11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1:.G11]; [.C11:.G11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3" office:value-type="string" calcext:value-type="string">
            <text:p>app_sqlinjection_errors</text:p>
          </table:table-cell>
          <table:table-cell table:style-name="ce68" office:value-type="float" office:value="9" calcext:value-type="float">
            <text:p>9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2" office:value-type="string" calcext:value-type="string">
            <text:p>ChatGPT</text:p>
          </table:table-cell>
          <table:table-cell table:style-name="ce76" office:value-type="string" calcext:value-type="string">
            <text:p>Deepseek</text:p>
          </table:table-cell>
          <table:table-cell table:style-name="ce79" table:number-matrix-columns-spanned="1" table:number-matrix-rows-spanned="1" table:formula="of:=INDEX([.C12:.G12]; MATCH(MAX(COUNTIF([.C12:.G12]; [.C12:.G12])); COUNTIF([.C12:.G12]; [.C12:.G12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2:.G12]; [.C12:.G12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db_anomalous_query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3:.G13]; MATCH(MAX(COUNTIF([.C13:.G13]; [.C13:.G13])); COUNTIF([.C13:.G13]; [.C13:.G13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3:.G13]; [.C13:.G13]))" office:value-type="float" office:value="5" calcext:value-type="float">
            <text:p>5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file_delete_win_delete_exchange_powershell_logs</text:p>
          </table:table-cell>
          <table:table-cell table:style-name="ce65" office:value-type="float" office:value="11" calcext:value-type="float">
            <text:p>11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opilot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4:.G14]; MATCH(MAX(COUNTIF([.C14:.G14]; [.C14:.G14])); COUNTIF([.C14:.G14]; [.C14:.G14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4:.G14]; [.C14:.G14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net_dns_katz_stealer_domain</text:p>
          </table:table-cell>
          <table:table-cell table:style-name="ce65" office:value-type="float" office:value="12" calcext:value-type="float">
            <text:p>12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number-columns-repeated="2" table:style-name="ce72" office:value-type="string" calcext:value-type="string">
            <text:p>Gemini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5:.G15]; MATCH(MAX(COUNTIF([.C15:.G15]; [.C15:.G15])); COUNTIF([.C15:.G15]; [.C15:.G15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5:.G15]; [.C15:.G15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opencanary_ssh_login_attempt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6:.G16]; MATCH(MAX(COUNTIF([.C16:.G16]; [.C16:.G16])); COUNTIF([.C16:.G16]; [.C16:.G16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6:.G16]; [.C16:.G16]))" office:value-type="float" office:value="5" calcext:value-type="float">
            <text:p>5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proxy_exploit_cve_2023_1389_unauth_command_injection_tplink_archer_ax21</text:p>
          </table:table-cell>
          <table:table-cell table:style-name="ce65" office:value-type="float" office:value="14" calcext:value-type="float">
            <text:p>14</text:p>
          </table:table-cell>
          <table:table-cell table:number-columns-repeated="4" table:style-name="ce72" office:value-type="string" calcext:value-type="string">
            <text:p>Deepseek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7:.G17]; MATCH(MAX(COUNTIF([.C17:.G17]; [.C17:.G17])); COUNTIF([.C17:.G17]; [.C17:.G17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17:.G17]; [.C17:.G17]))" office:value-type="float" office:value="4" calcext:value-type="float">
            <text:p>4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registry_event_runkey_winekey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8:.G18]; MATCH(MAX(COUNTIF([.C18:.G18]; [.C18:.G18])); COUNTIF([.C18:.G18]; [.C18:.G18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8:.G18]; [.C18:.G18]))" office:value-type="float" office:value="5" calcext:value-type="float">
            <text:p>5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appframework_django_exceptions</text:p>
          </table:table-cell>
          <table:table-cell table:style-name="ce65" office:value-type="float" office:value="16" calcext:value-type="float">
            <text:p>16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19:.G19]; MATCH(MAX(COUNTIF([.C19:.G19]; [.C19:.G19])); COUNTIF([.C19:.G19]; [.C19:.G19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19:.G19]; [.C19:.G19]))" office:value-type="float" office:value="5" calcext:value-type="float">
            <text:p>5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github_delete_action_invoked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20:.G20]; MATCH(MAX(COUNTIF([.C20:.G20]; [.C20:.G20])); COUNTIF([.C20:.G20]; [.C20:.G20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20:.G20]; [.C20:.G20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java_local_file_read</text:p>
          </table:table-cell>
          <table:table-cell table:style-name="ce65" office:value-type="float" office:value="18" calcext:value-type="float">
            <text:p>18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Copilot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21:.G21]; MATCH(MAX(COUNTIF([.C21:.G21]; [.C21:.G21])); COUNTIF([.C21:.G21]; [.C21:.G21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1:.G21]; [.C21:.G21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kubernetes_audit_exec_into_container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hatGPT</text:p>
          </table:table-cell>
          <table:table-cell table:style-name="ce79" table:number-matrix-columns-spanned="1" table:number-matrix-rows-spanned="1" table:formula="of:=INDEX([.C22:.G22]; MATCH(MAX(COUNTIF([.C22:.G22]; [.C22:.G22])); COUNTIF([.C22:.G22]; [.C22:.G22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2:.G22]; [.C22:.G22]))" office:value-type="float" office:value="4" calcext:value-type="float">
            <text:p>4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kubernetes_audit_secrets_modified_or_deleted</text:p>
          </table:table-cell>
          <table:table-cell table:style-name="ce65" office:value-type="float" office:value="20" calcext:value-type="float">
            <text:p>20</text:p>
          </table:table-cell>
          <table:table-cell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23:.G23]; MATCH(MAX(COUNTIF([.C23:.G23]; [.C23:.G23])); COUNTIF([.C23:.G23]; [.C23:.G23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23:.G23]; [.C23:.G23]))" office:value-type="float" office:value="2" calcext:value-type="float">
            <text:p>2</text:p>
          </table:table-cell>
          <table:table-cell table:style-name="ce79" office:value-type="string" calcext:value-type="string">
            <text:p>Claude</text:p>
          </table:table-cell>
          <table:table-cell table:style-name="ce81" office:value-type="float" office:value="2" calcext:value-type="float">
            <text:p>2</text:p>
          </table:table-cell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av_exploit_cve_2021_34527_print_nightmare</text:p>
          </table:table-cell>
          <table:table-cell table:style-name="ce65" office:value-type="float" office:value="21" calcext:value-type="float">
            <text:p>21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24:.G24]; MATCH(MAX(COUNTIF([.C24:.G24]; [.C24:.G24])); COUNTIF([.C24:.G24]; [.C24:.G24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4:.G24]; [.C24:.G24]))" office:value-type="float" office:value="4" calcext:value-type="float">
            <text:p>4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microsoft365_new_federated_domain_added_audit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25:.G25]; MATCH(MAX(COUNTIF([.C25:.G25]; [.C25:.G25])); COUNTIF([.C25:.G25]; [.C25:.G25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5:.G25]; [.C25:.G25]))" office:value-type="float" office:value="4" calcext:value-type="float">
            <text:p>4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win_appxdeployment_server_appx_downloaded_from_file_sharing_domains</text:p>
          </table:table-cell>
          <table:table-cell table:style-name="ce65" office:value-type="float" office:value="23" calcext:value-type="float">
            <text:p>23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number-columns-repeated="2" table:style-name="ce72" office:value-type="string" calcext:value-type="string">
            <text:p>ChatGPT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26:.G26]; MATCH(MAX(COUNTIF([.C26:.G26]; [.C26:.G26])); COUNTIF([.C26:.G26]; [.C26:.G26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6:.G26]; [.C26:.G26]))" office:value-type="float" office:value="2" calcext:value-type="float">
            <text:p>2</text:p>
          </table:table-cell>
          <table:table-cell table:style-name="ce79" office:value-type="string" calcext:value-type="string">
            <text:p>ChatGPT</text:p>
          </table:table-cell>
          <table:table-cell table:style-name="ce81" office:value-type="float" office:value="2" calcext:value-type="float">
            <text:p>2</text:p>
          </table:table-cell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file_event_lnx_doas_conf_creation</text:p>
          </table:table-cell>
          <table:table-cell table:style-name="ce65" office:value-type="float" office:value="24" calcext:value-type="float">
            <text:p>24</text:p>
          </table:table-cell>
          <table:table-cell table:number-columns-repeated="3" table:style-name="ce72" office:value-type="string" calcext:value-type="string">
            <text:p>Deepseek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27:.G27]; MATCH(MAX(COUNTIF([.C27:.G27]; [.C27:.G27])); COUNTIF([.C27:.G27]; [.C27:.G27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27:.G27]; [.C27:.G27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posh_pm_invoke_obfuscation_stdin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28:.G28]; MATCH(MAX(COUNTIF([.C28:.G28]; [.C28:.G28])); COUNTIF([.C28:.G28]; [.C28:.G28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8:.G28]; [.C28:.G28]))" office:value-type="float" office:value="5" calcext:value-type="float">
            <text:p>5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win_security_exploit_cve_2023_36884_office_windows_html_rce_share_access_pattern</text:p>
          </table:table-cell>
          <table:table-cell table:style-name="ce65" office:value-type="float" office:value="26" calcext:value-type="float">
            <text:p>26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2" office:value-type="string" calcext:value-type="string">
            <text:p>ChatGPT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29:.G29]; MATCH(MAX(COUNTIF([.C29:.G29]; [.C29:.G29])); COUNTIF([.C29:.G29]; [.C29:.G29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29:.G29]; [.C29:.G29]))" office:value-type="float" office:value="4" calcext:value-type="float">
            <text:p>4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appframework_ruby_on_rails_exceptions</text:p>
          </table:table-cell>
          <table:table-cell table:style-name="ce65" office:value-type="float" office:value="27" calcext:value-type="float">
            <text:p>27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30:.G30]; MATCH(MAX(COUNTIF([.C30:.G30]; [.C30:.G30])); COUNTIF([.C30:.G30]; [.C30:.G30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30:.G30]; [.C30:.G30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pipe_created_sysinternals_psexec_default_pipe_susp_location</text:p>
          </table:table-cell>
          <table:table-cell table:style-name="ce65" office:value-type="float" office:value="28" calcext:value-type="float">
            <text:p>28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31:.G31]; MATCH(MAX(COUNTIF([.C31:.G31]; [.C31:.G31])); COUNTIF([.C31:.G31]; [.C31:.G31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31:.G31]; [.C31:.G31]))" office:value-type="float" office:value="4" calcext:value-type="float">
            <text:p>4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file_event_win_susp_startup_folder_persistence</text:p>
          </table:table-cell>
          <table:table-cell table:style-name="ce65" office:value-type="float" office:value="29" calcext:value-type="float">
            <text:p>29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32:.G32]; MATCH(MAX(COUNTIF([.C32:.G32]; [.C32:.G32])); COUNTIF([.C32:.G32]; [.C32:.G32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32:.G32]; [.C32:.G32]))" office:value-type="float" office:value="5" calcext:value-type="float">
            <text:p>5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proc_creation_macos_remote_access_tools_meshagent_arguments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hatGPT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33:.G33]; MATCH(MAX(COUNTIF([.C33:.G33]; [.C33:.G33])); COUNTIF([.C33:.G33]; [.C33:.G33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33:.G33]; [.C33:.G33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create_remote_thread_win_powershell_generic.yml</text:p>
          </table:table-cell>
          <table:table-cell table:style-name="ce65" office:value-type="float" office:value="31" calcext:value-type="float">
            <text:p>31</text:p>
          </table:table-cell>
          <table:table-cell table:number-columns-repeated="4" table:style-name="ce72" office:value-type="string" calcext:value-type="string">
            <text:p>Claude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34:.G34]; MATCH(MAX(COUNTIF([.C34:.G34]; [.C34:.G34])); COUNTIF([.C34:.G34]; [.C34:.G34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34:.G34]; [.C34:.G34]))" office:value-type="float" office:value="4" calcext:value-type="float">
            <text:p>4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image_load_susp_clickonce_unsigned_module_loaded</text:p>
          </table:table-cell>
          <table:table-cell table:style-name="ce65" office:value-type="float" office:value="32" calcext:value-type="float">
            <text:p>32</text:p>
          </table:table-cell>
          <table:table-cell table:number-columns-repeated="4" table:style-name="ce72" office:value-type="string" calcext:value-type="string">
            <text:p>Deepseek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35:.G35]; MATCH(MAX(COUNTIF([.C35:.G35]; [.C35:.G35])); COUNTIF([.C35:.G35]; [.C35:.G35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35:.G35]; [.C35:.G35]))" office:value-type="float" office:value="4" calcext:value-type="float">
            <text:p>4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web_sql_injection_in_access_logs</text:p>
          </table:table-cell>
          <table:table-cell table:style-name="ce65" office:value-type="float" office:value="33" calcext:value-type="float">
            <text:p>33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Copilot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hatGPT</text:p>
          </table:table-cell>
          <table:table-cell table:style-name="ce79" table:number-matrix-columns-spanned="1" table:number-matrix-rows-spanned="1" table:formula="of:=INDEX([.C36:.G36]; MATCH(MAX(COUNTIF([.C36:.G36]; [.C36:.G36])); COUNTIF([.C36:.G36]; [.C36:.G36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36:.G36]; [.C36:.G36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proc_creation_lnx_mal_shai_hulud_indicator</text:p>
          </table:table-cell>
          <table:table-cell table:style-name="ce65" office:value-type="float" office:value="34" calcext:value-type="float">
            <text:p>34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Gemini</text:p>
          </table:table-cell>
          <table:table-cell table:style-name="ce79" table:number-matrix-columns-spanned="1" table:number-matrix-rows-spanned="1" table:formula="of:=INDEX([.C37:.G37]; MATCH(MAX(COUNTIF([.C37:.G37]; [.C37:.G37])); COUNTIF([.C37:.G37]; [.C37:.G37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37:.G37]; [.C37:.G37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zeek_http_executable_download_from_webdav</text:p>
          </table:table-cell>
          <table:table-cell table:style-name="ce65" office:value-type="float" office:value="35" calcext:value-type="float">
            <text:p>35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38:.G38]; MATCH(MAX(COUNTIF([.C38:.G38]; [.C38:.G38])); COUNTIF([.C38:.G38]; [.C38:.G38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38:.G38]; [.C38:.G38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file_event_win_malware_darkgate_autoit3_save_temp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39:.G39]; MATCH(MAX(COUNTIF([.C39:.G39]; [.C39:.G39])); COUNTIF([.C39:.G39]; [.C39:.G39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39:.G39]; [.C39:.G39]))" office:value-type="float" office:value="4" calcext:value-type="float">
            <text:p>4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nodejs_rce_exploitation_attempt</text:p>
          </table:table-cell>
          <table:table-cell table:style-name="ce65" office:value-type="float" office:value="37" calcext:value-type="float">
            <text:p>37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2" office:value-type="string" calcext:value-type="string">
            <text:p>ChatGPT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40:.G40]; MATCH(MAX(COUNTIF([.C40:.G40]; [.C40:.G40])); COUNTIF([.C40:.G40]; [.C40:.G40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0:.G40]; [.C40:.G40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proc_creation_win_reg_query_registry</text:p>
          </table:table-cell>
          <table:table-cell table:style-name="ce65" office:value-type="float" office:value="38" calcext:value-type="float">
            <text:p>38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41:.G41]; MATCH(MAX(COUNTIF([.C41:.G41]; [.C41:.G41])); COUNTIF([.C41:.G41]; [.C41:.G41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41:.G41]; [.C41:.G41]))" office:value-type="float" office:value="2" calcext:value-type="float">
            <text:p>2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app_python_sql_exceptions</text:p>
          </table:table-cell>
          <table:table-cell table:style-name="ce65" office:value-type="float" office:value="39" calcext:value-type="float">
            <text:p>39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42:.G42]; MATCH(MAX(COUNTIF([.C42:.G42]; [.C42:.G42])); COUNTIF([.C42:.G42]; [.C42:.G42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42:.G42]; [.C42:.G42]))" office:value-type="float" office:value="2" calcext:value-type="float">
            <text:p>2</text:p>
          </table:table-cell>
          <table:table-cell table:style-name="ce79" office:value-type="string" calcext:value-type="string">
            <text:p>Claude</text:p>
          </table:table-cell>
          <table:table-cell table:style-name="ce81" office:value-type="float" office:value="2" calcext:value-type="float">
            <text:p>2</text:p>
          </table:table-cell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file_event_macos_python_path_configuration_files</text:p>
          </table:table-cell>
          <table:table-cell table:style-name="ce65" office:value-type="float" office:value="40" calcext:value-type="float">
            <text:p>40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43:.G43]; MATCH(MAX(COUNTIF([.C43:.G43]; [.C43:.G43])); COUNTIF([.C43:.G43]; [.C43:.G43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3:.G43]; [.C43:.G43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spring_application_exceptions</text:p>
          </table:table-cell>
          <table:table-cell table:style-name="ce65" office:value-type="float" office:value="41" calcext:value-type="float">
            <text:p>41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Copilot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Gemini</text:p>
          </table:table-cell>
          <table:table-cell table:style-name="ce79" table:number-matrix-columns-spanned="1" table:number-matrix-rows-spanned="1" table:formula="of:=INDEX([.C44:.G44]; MATCH(MAX(COUNTIF([.C44:.G44]; [.C44:.G44])); COUNTIF([.C44:.G44]; [.C44:.G44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4:.G44]; [.C44:.G44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okta_policy_rule_modified_or_deleted</text:p>
          </table:table-cell>
          <table:table-cell table:style-name="ce65" office:value-type="float" office:value="42" calcext:value-type="float">
            <text:p>42</text:p>
          </table:table-cell>
          <table:table-cell table:style-name="ce72" office:value-type="string" calcext:value-type="string">
            <text:p>Claude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45:.G45]; MATCH(MAX(COUNTIF([.C45:.G45]; [.C45:.G45])); COUNTIF([.C45:.G45]; [.C45:.G45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45:.G45]; [.C45:.G45]))" office:value-type="float" office:value="2" calcext:value-type="float">
            <text:p>2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cisco_duo_mfa_bypass_via_bypass_code</text:p>
          </table:table-cell>
          <table:table-cell table:style-name="ce65" office:value-type="float" office:value="43" calcext:value-type="float">
            <text:p>43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ChatGPT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Copilot</text:p>
          </table:table-cell>
          <table:table-cell table:style-name="ce76" office:value-type="string" calcext:value-type="string">
            <text:p>ChatGPT</text:p>
          </table:table-cell>
          <table:table-cell table:style-name="ce79" table:number-matrix-columns-spanned="1" table:number-matrix-rows-spanned="1" table:formula="of:=INDEX([.C46:.G46]; MATCH(MAX(COUNTIF([.C46:.G46]; [.C46:.G46])); COUNTIF([.C46:.G46]; [.C46:.G46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6:.G46]; [.C46:.G46]))" office:value-type="float" office:value="2" calcext:value-type="float">
            <text:p>2</text:p>
          </table:table-cell>
          <table:table-cell table:style-name="ce79" office:value-type="string" calcext:value-type="string">
            <text:p>ChatGPT</text:p>
          </table:table-cell>
          <table:table-cell table:style-name="ce81" office:value-type="float" office:value="2" calcext:value-type="float">
            <text:p>2</text:p>
          </table:table-cell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file_rename_win_non_dll_to_dll_ext</text:p>
          </table:table-cell>
          <table:table-cell table:style-name="ce65" office:value-type="float" office:value="44" calcext:value-type="float">
            <text:p>44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Gemini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ChatGPT</text:p>
          </table:table-cell>
          <table:table-cell table:style-name="ce76" office:value-type="string" calcext:value-type="string">
            <text:p>Copilot</text:p>
          </table:table-cell>
          <table:table-cell table:style-name="ce79" table:number-matrix-columns-spanned="1" table:number-matrix-rows-spanned="1" table:formula="of:=INDEX([.C47:.G47]; MATCH(MAX(COUNTIF([.C47:.G47]; [.C47:.G47])); COUNTIF([.C47:.G47]; [.C47:.G47]); 0))" office:value-type="string" office:string-value="Deepseek" calcext:value-type="string">
            <text:p>Deepseek</text:p>
          </table:table-cell>
          <table:table-cell table:style-name="ce81" table:number-matrix-columns-spanned="1" table:number-matrix-rows-spanned="1" table:formula="of:=MAX(COUNTIF([.C47:.G47]; [.C47:.G47]))" office:value-type="float" office:value="1" calcext:value-type="float">
            <text:p>1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net_connection_win_silenttrinity_stager_msbuild_activity</text:p>
          </table:table-cell>
          <table:table-cell table:style-name="ce65" office:value-type="float" office:value="45" calcext:value-type="float">
            <text:p>45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Copilot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style-name="ce76" office:value-type="string" calcext:value-type="string">
            <text:p>ChatGPT</text:p>
          </table:table-cell>
          <table:table-cell table:style-name="ce79" table:number-matrix-columns-spanned="1" table:number-matrix-rows-spanned="1" table:formula="of:=INDEX([.C48:.G48]; MATCH(MAX(COUNTIF([.C48:.G48]; [.C48:.G48])); COUNTIF([.C48:.G48]; [.C48:.G48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8:.G48]; [.C48:.G48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posh_pm_alternate_powershell_hosts</text:p>
          </table:table-cell>
          <table:table-cell table:style-name="ce65" office:value-type="float" office:value="46" calcext:value-type="float">
            <text:p>46</text:p>
          </table:table-cell>
          <table:table-cell table:number-columns-repeated="2" table:style-name="ce72" office:value-type="string" calcext:value-type="string">
            <text:p>Claude</text:p>
          </table:table-cell>
          <table:table-cell table:number-columns-repeated="2" table:style-name="ce72" office:value-type="string" calcext:value-type="string">
            <text:p>Deepseek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49:.G49]; MATCH(MAX(COUNTIF([.C49:.G49]; [.C49:.G49])); COUNTIF([.C49:.G49]; [.C49:.G49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49:.G49]; [.C49:.G49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proc_access_win_lsass_susp_access_flag</text:p>
          </table:table-cell>
          <table:table-cell table:style-name="ce65" office:value-type="float" office:value="47" calcext:value-type="float">
            <text:p>47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Deepseek</text:p>
          </table:table-cell>
          <table:table-cell table:style-name="ce72" office:value-type="string" calcext:value-type="string">
            <text:p>Claude</text:p>
          </table:table-cell>
          <table:table-cell table:style-name="ce72" office:value-type="string" calcext:value-type="string">
            <text:p>ChatGPT</text:p>
          </table:table-cell>
          <table:table-cell table:style-name="ce76" office:value-type="string" calcext:value-type="string">
            <text:p>Claude</text:p>
          </table:table-cell>
          <table:table-cell table:style-name="ce79" table:number-matrix-columns-spanned="1" table:number-matrix-rows-spanned="1" table:formula="of:=INDEX([.C50:.G50]; MATCH(MAX(COUNTIF([.C50:.G50]; [.C50:.G50])); COUNTIF([.C50:.G50]; [.C50:.G50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50:.G50]; [.C50:.G50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velocity_ssti_injection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2" office:value-type="string" calcext:value-type="string">
            <text:p>Gemini</text:p>
          </table:table-cell>
          <table:table-cell table:style-name="ce76" office:value-type="string" calcext:value-type="string">
            <text:p>Deepseek</text:p>
          </table:table-cell>
          <table:table-cell table:style-name="ce79" table:number-matrix-columns-spanned="1" table:number-matrix-rows-spanned="1" table:formula="of:=INDEX([.C51:.G51]; MATCH(MAX(COUNTIF([.C51:.G51]; [.C51:.G51])); COUNTIF([.C51:.G51]; [.C51:.G51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51:.G51]; [.C51:.G51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zeek_dce_rpc_mitre_bzar_persistence</text:p>
          </table:table-cell>
          <table:table-cell table:style-name="ce65" office:value-type="float" office:value="49" calcext:value-type="float">
            <text:p>49</text:p>
          </table:table-cell>
          <table:table-cell table:style-name="ce72" office:value-type="string" calcext:value-type="string">
            <text:p>Deepseek</text:p>
          </table:table-cell>
          <table:table-cell table:number-columns-repeated="3" table:style-name="ce72" office:value-type="string" calcext:value-type="string">
            <text:p>Claude</text:p>
          </table:table-cell>
          <table:table-cell table:style-name="ce76" office:value-type="string" calcext:value-type="string">
            <text:p>Deepseek</text:p>
          </table:table-cell>
          <table:table-cell table:style-name="ce79" table:number-matrix-columns-spanned="1" table:number-matrix-rows-spanned="1" table:formula="of:=INDEX([.C52:.G52]; MATCH(MAX(COUNTIF([.C52:.G52]; [.C52:.G52])); COUNTIF([.C52:.G52]; [.C52:.G52]); 0))" office:value-type="string" office:string-value="Claude" calcext:value-type="string">
            <text:p>Claude</text:p>
          </table:table-cell>
          <table:table-cell table:style-name="ce81" table:number-matrix-columns-spanned="1" table:number-matrix-rows-spanned="1" table:formula="of:=MAX(COUNTIF([.C52:.G52]; [.C52:.G52]))" office:value-type="float" office:value="3" calcext:value-type="float">
            <text:p>3</text:p>
          </table:table-cell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66" office:value-type="string" calcext:value-type="string">
            <text:p>net_dns_susp_telegram_api</text:p>
          </table:table-cell>
          <table:table-cell table:style-name="ce69" office:value-type="float" office:value="50" calcext:value-type="float">
            <text:p>50</text:p>
          </table:table-cell>
          <table:table-cell table:number-columns-repeated="4" table:style-name="ce73" office:value-type="string" calcext:value-type="string">
            <text:p>Deepseek</text:p>
          </table:table-cell>
          <table:table-cell table:style-name="ce77" office:value-type="string" calcext:value-type="string">
            <text:p>Claude</text:p>
          </table:table-cell>
          <table:table-cell table:style-name="ce80" table:number-matrix-columns-spanned="1" table:number-matrix-rows-spanned="1" table:formula="of:=INDEX([.C53:.G53]; MATCH(MAX(COUNTIF([.C53:.G53]; [.C53:.G53])); COUNTIF([.C53:.G53]; [.C53:.G53]); 0))" office:value-type="string" office:string-value="Deepseek" calcext:value-type="string">
            <text:p>Deepseek</text:p>
          </table:table-cell>
          <table:table-cell table:style-name="ce82" table:number-matrix-columns-spanned="1" table:number-matrix-rows-spanned="1" table:formula="of:=MAX(COUNTIF([.C53:.G53]; [.C53:.G53]))" office:value-type="float" office:value="4" calcext:value-type="float">
            <text:p>4</text:p>
          </table:table-cell>
          <table:table-cell table:style-name="ce80"/>
          <table:table-cell table:style-name="ce82"/>
          <table:table-cell table:style-name="ce84"/>
          <table:table-cell table:style-name="ce83" table:number-columns-repeated="9"/>
          <table:table-cell table:number-columns-repeated="1003"/>
        </table:table-row>
        <table:table-row table:style-name="ro2">
          <table:table-cell/>
          <table:table-cell table:style-name="ce67"/>
          <table:table-cell table:style-name="ce74" table:number-columns-repeated="4"/>
          <table:table-cell table:style-name="ce78"/>
          <table:table-cell table:style-name="ce79"/>
          <table:table-cell table:style-name="ce81"/>
          <table:table-cell table:style-name="ce79"/>
          <table:table-cell table:style-name="ce81"/>
          <table:table-cell table:style-name="ce67"/>
          <table:table-cell table:number-columns-repeated="1012"/>
        </table:table-row>
        <table:table-row table:style-name="ro2">
          <table:table-cell/>
          <table:table-cell table:style-name="ce67"/>
          <table:table-cell table:style-name="ce71" table:number-matrix-columns-spanned="1" table:number-matrix-rows-spanned="1" table:formula="of:=INDEX([.C4:.C53]; MATCH(MAX(COUNTIF([.C4:.C53]; [.C4:.C53])); COUNTIF([.C4:.C53]; [.C4:.C53]); 0))" office:value-type="string" office:string-value="Claude" calcext:value-type="string">
            <text:p>Claude</text:p>
          </table:table-cell>
          <table:table-cell table:style-name="ce71" table:number-matrix-columns-spanned="1" table:number-matrix-rows-spanned="1" table:formula="of:=INDEX([.D4:.D53]; MATCH(MAX(COUNTIF([.D4:.D53]; [.D4:.D53])); COUNTIF([.D4:.D53]; [.D4:.D53]); 0))" office:value-type="string" office:string-value="Claude" calcext:value-type="string">
            <text:p>Claude</text:p>
          </table:table-cell>
          <table:table-cell table:style-name="ce71" table:number-matrix-columns-spanned="1" table:number-matrix-rows-spanned="1" table:formula="of:=INDEX([.E4:.E53]; MATCH(MAX(COUNTIF([.E4:.E53]; [.E4:.E53])); COUNTIF([.E4:.E53]; [.E4:.E53]); 0))" office:value-type="string" office:string-value="Claude" calcext:value-type="string">
            <text:p>Claude</text:p>
          </table:table-cell>
          <table:table-cell table:style-name="ce71" table:number-matrix-columns-spanned="1" table:number-matrix-rows-spanned="1" table:formula="of:=INDEX([.F4:.F53]; MATCH(MAX(COUNTIF([.F4:.F53]; [.F4:.F53])); COUNTIF([.F4:.F53]; [.F4:.F53]); 0))" office:value-type="string" office:string-value="Claude" calcext:value-type="string">
            <text:p>Claude</text:p>
          </table:table-cell>
          <table:table-cell table:style-name="ce75" table:number-matrix-columns-spanned="1" table:number-matrix-rows-spanned="1" table:formula="of:=INDEX([.G4:.G53]; MATCH(MAX(COUNTIF([.G4:.G53]; [.G4:.G53])); COUNTIF([.G4:.G53]; [.G4:.G53]); 0))" office:value-type="string" office:string-value="Claude" calcext:value-type="string">
            <text:p>Claude</text:p>
          </table:table-cell>
          <table:table-cell table:style-name="ce79"/>
          <table:table-cell table:style-name="ce81"/>
          <table:table-cell table:style-name="ce79"/>
          <table:table-cell table:style-name="ce81"/>
          <table:table-cell table:style-name="ce67"/>
          <table:table-cell table:number-columns-repeated="1012"/>
        </table:table-row>
        <table:table-row table:style-name="ro2">
          <table:table-cell/>
          <table:table-cell table:style-name="ce67"/>
          <table:table-cell table:style-name="ce71" table:number-matrix-columns-spanned="1" table:number-matrix-rows-spanned="1" table:formula="of:=MAX(COUNTIF([.C4:.C53]; [.C4:.C53]))" office:value-type="float" office:value="36" calcext:value-type="float">
            <text:p>36</text:p>
          </table:table-cell>
          <table:table-cell table:style-name="ce71" table:number-matrix-columns-spanned="1" table:number-matrix-rows-spanned="1" table:formula="of:=MAX(COUNTIF([.D4:.D53]; [.D4:.D53]))" office:value-type="float" office:value="31" calcext:value-type="float">
            <text:p>31</text:p>
          </table:table-cell>
          <table:table-cell table:style-name="ce71" table:number-matrix-columns-spanned="1" table:number-matrix-rows-spanned="1" table:formula="of:=MAX(COUNTIF([.E4:.E53]; [.E4:.E53]))" office:value-type="float" office:value="40" calcext:value-type="float">
            <text:p>40</text:p>
          </table:table-cell>
          <table:table-cell table:style-name="ce71" table:number-matrix-columns-spanned="1" table:number-matrix-rows-spanned="1" table:formula="of:=MAX(COUNTIF([.F4:.F53]; [.F4:.F53]))" office:value-type="float" office:value="25" calcext:value-type="float">
            <text:p>25</text:p>
          </table:table-cell>
          <table:table-cell table:style-name="ce75" table:number-matrix-columns-spanned="1" table:number-matrix-rows-spanned="1" table:formula="of:=MAX(COUNTIF([.G4:.G53]; [.G4:.G53]))" office:value-type="float" office:value="22" calcext:value-type="float">
            <text:p>22</text:p>
          </table:table-cell>
          <table:table-cell table:style-name="ce79"/>
          <table:table-cell table:style-name="ce81"/>
          <table:table-cell table:style-name="ce79"/>
          <table:table-cell table:style-name="ce81"/>
          <table:table-cell table:style-name="ce67"/>
          <table:table-cell table:number-columns-repeated="1012"/>
        </table:table-row>
        <table:table-row table:style-name="ro2" table:number-rows-repeated="944">
          <table:table-cell/>
          <table:table-cell table:style-name="ce67"/>
          <table:table-cell table:style-name="ce74" table:number-columns-repeated="4"/>
          <table:table-cell table:style-name="ce78"/>
          <table:table-cell table:style-name="ce79"/>
          <table:table-cell table:style-name="ce81"/>
          <table:table-cell table:style-name="ce79"/>
          <table:table-cell table:style-name="ce81"/>
          <table:table-cell table:style-name="ce67"/>
          <table:table-cell table:number-columns-repeated="101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gras filtradas" table:style-name="ta5">
        <table:table-column table:style-name="co9" table:default-cell-style-name="Default"/>
        <table:table-column table:style-name="co8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8" table:number-columns-repeated="1013" table:default-cell-style-name="Default"/>
        <table:table-row table:style-name="ro2">
          <table:table-cell table:style-name="ce65" office:value-type="string" calcext:value-type="string">
            <text:p>Regra</text:p>
          </table:table-cell>
          <table:table-cell table:style-name="ce52" office:value-type="string" calcext:value-type="string">
            <text:p>Prompt1</text:p>
          </table:table-cell>
          <table:table-cell table:style-name="ce52" office:value-type="string" calcext:value-type="string">
            <text:p>Prompt2</text:p>
          </table:table-cell>
          <table:table-cell table:style-name="ce65" table:number-columns-repeated="3"/>
          <table:table-cell table:style-name="ce85"/>
          <table:table-cell table:style-name="ce79"/>
          <table:table-cell table:style-name="ce81"/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>
          <table:table-cell table:style-name="ce31" office:value-type="string" calcext:value-type="string">
            <text:p>bitbucket_audit_unauthorized_full_data_export_triggered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azure_app_device_code_authentication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zeek_susp_kerberos_rc4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osh_ps_modify_group_policy_settings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win_firewall_as_add_rule_wmiprvse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huawei_bgp_auth_failed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rpc_firewall_printing_lateral_movement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registry_set_change_security_zones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3" office:value-type="string" calcext:value-type="string">
            <text:p>app_sqlinjection_errors</text:p>
          </table:table-cell>
          <table:table-cell table:style-name="ce33" office:value-type="string" calcext:value-type="string">
            <text:p>ChatGPT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db_anomalous_query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delete_win_delete_exchange_powershell_logs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net_dns_katz_stealer_domain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opencanary_ssh_login_attempt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roxy_exploit_cve_2023_1389_unauth_command_injection_tplink_archer_ax21</text:p>
          </table:table-cell>
          <table:table-cell table:number-columns-repeated="2" table:style-name="ce31" office:value-type="string" calcext:value-type="string">
            <text:p>Deepseek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registry_event_runkey_winekey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appframework_django_exceptions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github_delete_action_invoked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java_local_file_read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kubernetes_audit_exec_into_container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kubernetes_audit_secrets_modified_or_deleted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av_exploit_cve_2021_34527_print_nightmare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microsoft365_new_federated_domain_added_audit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win_appxdeployment_server_appx_downloaded_from_file_sharing_domains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event_lnx_doas_conf_creation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Deepseek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osh_pm_invoke_obfuscation_stdin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win_security_exploit_cve_2023_36884_office_windows_html_rce_share_access_pattern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appframework_ruby_on_rails_exceptions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ipe_created_sysinternals_psexec_default_pipe_susp_location</text:p>
          </table:table-cell>
          <table:table-cell table:style-name="ce31" office:value-type="string" calcext:value-type="string">
            <text:p>ChatGPT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event_win_susp_startup_folder_persistence</text:p>
          </table:table-cell>
          <table:table-cell table:style-name="ce31" office:value-type="string" calcext:value-type="string">
            <text:p>Gemini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roc_creation_macos_remote_access_tools_meshagent_arguments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create_remote_thread_win_powershell_generic.yml</text:p>
          </table:table-cell>
          <table:table-cell table:style-name="ce31" office:value-type="string" calcext:value-type="string">
            <text:p>Copilot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image_load_susp_clickonce_unsigned_module_loaded</text:p>
          </table:table-cell>
          <table:table-cell table:style-name="ce31" office:value-type="string" calcext:value-type="string">
            <text:p>Copilot</text:p>
          </table:table-cell>
          <table:table-cell table:style-name="ce31" office:value-type="string" calcext:value-type="string">
            <text:p>Deepseek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web_sql_injection_in_access_logs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roc_creation_lnx_mal_shai_hulud_indicator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zeek_http_executable_download_from_webdav</text:p>
          </table:table-cell>
          <table:table-cell table:number-columns-repeated="2" table:style-name="ce31" office:value-type="string" calcext:value-type="string">
            <text:p>Deepseek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event_win_malware_darkgate_autoit3_save_temp</text:p>
          </table:table-cell>
          <table:table-cell table:style-name="ce31" office:value-type="string" calcext:value-type="string">
            <text:p>NONE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nodejs_rce_exploitation_attempt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roc_creation_win_reg_query_registry</text:p>
          </table:table-cell>
          <table:table-cell table:number-columns-repeated="2" table:style-name="ce31" office:value-type="string" calcext:value-type="string">
            <text:p>Deepseek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app_python_sql_exceptions</text:p>
          </table:table-cell>
          <table:table-cell table:number-columns-repeated="2" table:style-name="ce31" office:value-type="string" calcext:value-type="string">
            <text:p>Deepseek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event_macos_python_path_configuration_files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spring_application_exceptions</text:p>
          </table:table-cell>
          <table:table-cell table:style-name="ce31" office:value-type="string" calcext:value-type="string">
            <text:p>Deepseek</text:p>
          </table:table-cell>
          <table:table-cell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okta_policy_rule_modified_or_deleted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cisco_duo_mfa_bypass_via_bypass_code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file_rename_win_non_dll_to_dll_ext</text:p>
          </table:table-cell>
          <table:table-cell table:style-name="ce31" office:value-type="string" calcext:value-type="string">
            <text:p>Claude</text:p>
          </table:table-cell>
          <table:table-cell table:style-name="ce31" office:value-type="string" calcext:value-type="string">
            <text:p>Deepseek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net_connection_win_silenttrinity_stager_msbuild_activity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osh_pm_alternate_powershell_hosts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proc_access_win_lsass_susp_access_flag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velocity_ssti_injection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31" office:value-type="string" calcext:value-type="string">
            <text:p>zeek_dce_rpc_mitre_bzar_persistence</text:p>
          </table:table-cell>
          <table:table-cell table:number-columns-repeated="2" table:style-name="ce31" office:value-type="string" calcext:value-type="string">
            <text:p>Claude</text:p>
          </table:table-cell>
          <table:table-cell table:style-name="ce31" table:number-columns-repeated="3"/>
          <table:table-cell table:style-name="ce45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>
          <table:table-cell table:style-name="ce66" office:value-type="string" calcext:value-type="string">
            <text:p>net_dns_susp_telegram_api</text:p>
          </table:table-cell>
          <table:table-cell table:number-columns-repeated="2" table:style-name="ce66" office:value-type="string" calcext:value-type="string">
            <text:p>Deepseek</text:p>
          </table:table-cell>
          <table:table-cell table:style-name="ce66" table:number-columns-repeated="3"/>
          <table:table-cell table:style-name="ce86"/>
          <table:table-cell table:style-name="ce80"/>
          <table:table-cell table:style-name="ce82"/>
          <table:table-cell table:style-name="ce80"/>
          <table:table-cell table:style-name="ce82"/>
          <table:table-cell table:style-name="ce83" table:number-columns-repeated="10"/>
          <table:table-cell table:number-columns-repeated="1003"/>
        </table:table-row>
        <table:table-row table:style-name="ro2">
          <table:table-cell/>
          <table:table-cell table:style-name="ce67"/>
          <table:table-cell table:number-columns-repeated="4"/>
          <table:table-cell table:style-name="ce51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2" table:number-rows-repeated="2">
          <table:table-cell table:style-name="ce67" table:number-columns-repeated="2"/>
          <table:table-cell table:style-name="ce65" table:number-columns-repeated="4"/>
          <table:table-cell table:style-name="ce85"/>
          <table:table-cell table:style-name="ce79"/>
          <table:table-cell table:style-name="ce81"/>
          <table:table-cell table:style-name="ce79"/>
          <table:table-cell table:style-name="ce81"/>
          <table:table-cell table:style-name="ce67" table:number-columns-repeated="10"/>
          <table:table-cell table:number-columns-repeated="1003"/>
        </table:table-row>
        <table:table-row table:style-name="ro2" table:number-rows-repeated="944">
          <table:table-cell/>
          <table:table-cell table:style-name="ce67"/>
          <table:table-cell table:number-columns-repeated="4"/>
          <table:table-cell table:style-name="ce51"/>
          <table:table-cell table:style-name="ce79"/>
          <table:table-cell table:style-name="ce81"/>
          <table:table-cell table:style-name="ce79"/>
          <table:table-cell table:style-name="ce81"/>
          <table:table-cell table:number-columns-repeated="1013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barito" style:display-name="PageStyle_Gabari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mpt1" style:display-name="PageStyle_Promp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mpt2" style:display-name="PageStyle_Promp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ras_20_filtradas" style:display-name="PageStyle_Regras filtrad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474" meta:object-count="0"/>
    <meta:generator>LibreOfficeDev/6.0.5.2$Linux_X86_64 LibreOffice_project/</meta:generator>
  </office:meta>
</office:document-meta>
</file>