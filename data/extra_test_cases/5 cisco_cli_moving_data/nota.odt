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17cm"/>
    </style:style>
    <style:style style:name="Table1.B" style:family="table-column">
      <style:table-column-properties style:column-width="9.019cm"/>
    </style:style>
    <style:style style:name="Table1.C" style:family="table-column">
      <style:table-column-properties style:column-width="5.46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556cm" table:align="left"/>
    </style:style>
    <style:style style:name="Table2.A" style:family="table-column">
      <style:table-column-properties style:column-width="7.636cm"/>
    </style:style>
    <style:style style:name="Table2.B" style:family="table-column">
      <style:table-column-properties style:column-width="7.9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orphans="1"/>
    </style:style>
    <style:style style:name="P2" style:family="paragraph" style:parent-style-name="Text_20_body">
      <style:paragraph-properties fo:margin-left="0cm" fo:margin-right="0cm" fo:orphans="1" fo:text-indent="0cm" style:auto-text-indent="false"/>
    </style:style>
    <style:style style:name="P3" style:family="paragraph" style:parent-style-name="Text_20_body">
      <style:paragraph-properties fo:margin-left="1cm" fo:margin-right="1cm" fo:orphans="1" fo:text-indent="0cm" style:auto-text-indent="false"/>
    </style:style>
    <style:style style:name="P4" style:family="paragraph" style:parent-style-name="Text_20_body">
      <style:paragraph-properties fo:orphans="1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 fo:orphans="1"/>
    </style:style>
    <style:style style:name="P7" style:family="paragraph" style:parent-style-name="Text_20_body" style:list-style-name="L1">
      <style:paragraph-properties fo:orphans="1"/>
    </style:style>
    <style:style style:name="P8" style:family="paragraph" style:parent-style-name="Text_20_body" style:list-style-name="L2">
      <style:paragraph-properties fo:margin-top="0cm" fo:margin-bottom="0cm" style:contextual-spacing="false" fo:orphans="1"/>
    </style:style>
    <style:style style:name="P9" style:family="paragraph" style:parent-style-name="Text_20_body" style:list-style-name="L2">
      <style:paragraph-properties fo:orphans="1"/>
    </style:style>
    <style:style style:name="P10" style:family="paragraph" style:parent-style-name="Text_20_body" style:list-style-name="L3">
      <style:paragraph-properties fo:margin-top="0cm" fo:margin-bottom="0cm" style:contextual-spacing="false" fo:orphans="1"/>
    </style:style>
    <style:style style:name="P11" style:family="paragraph" style:parent-style-name="Text_20_body" style:list-style-name="L3">
      <style:paragraph-properties fo:orphans="1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á basicamente igual. quais as chances de o agente ter copiado da internet? kkkkk</text:p>
      <text:p text:style-name="Text_20_body">5:52 PM</text:p>
      <text:p text:style-name="P2">😂 As chances são <text:span text:style-name="Strong_20_Emphasis">100%</text:span>. Não houve geração — houve <text:span text:style-name="Strong_20_Emphasis">cópia</text:span>.</text:p>
      <text:p text:style-name="P4">Compara as duas regras lado a lado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mpo</text:p>
            </table:table-cell>
            <table:table-cell table:style-name="Table1.A1" office:value-type="string">
              <text:p text:style-name="Table_20_Heading">Original SigmaHQ (<text:span text:style-name="Source_20_Text">cisco_cli_moving_data.yml</text:span>)</text:p>
            </table:table-cell>
            <table:table-cell table:style-name="Table1.A1" office:value-type="string">
              <text:p text:style-name="Table_20_Heading">Gerada pelo agente</text:p>
            </table:table-cell>
          </table:table-row>
        </table:table-header-rows>
        <table:table-row>
          <table:table-cell table:style-name="Table1.A1" office:value-type="string">
            <text:p text:style-name="Table_20_Contents">title</text:p>
          </table:table-cell>
          <table:table-cell table:style-name="Table1.A1" office:value-type="string">
            <text:p text:style-name="Table_20_Contents">Cisco Stage Data</text:p>
          </table:table-cell>
          <table:table-cell table:style-name="Table1.A1" office:value-type="string">
            <text:p text:style-name="Table_20_Contents">Cisco Stage Data ✓</text:p>
          </table:table-cell>
        </table:table-row>
        <table:table-row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Various protocols maybe used...</text:p>
          </table:table-cell>
          <table:table-cell table:style-name="Table1.A1" office:value-type="string">
            <text:p text:style-name="Table_20_Contents">Various protocols maybe used... ✓</text:p>
          </table:table-cell>
        </table:table-row>
        <table:table-row>
          <table:table-cell table:style-name="Table1.A1" office:value-type="string">
            <text:p text:style-name="Table_20_Contents">author</text:p>
          </table:table-cell>
          <table:table-cell table:style-name="Table1.A1" office:value-type="string">
            <text:p text:style-name="Table_20_Contents">Austin Clark</text:p>
          </table:table-cell>
          <table:table-cell table:style-name="Table1.A1" office:value-type="string">
            <text:p text:style-name="Table_20_Contents">Austin Clark ✓</text:p>
          </table:table-cell>
        </table:table-row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2019-08-12</text:p>
          </table:table-cell>
          <table:table-cell table:style-name="Table1.A1" office:value-type="string">
            <text:p text:style-name="Table_20_Contents">2019-08-12 ✓</text:p>
          </table:table-cell>
        </table:table-row>
        <table:table-row>
          <table:table-cell table:style-name="Table1.A1" office:value-type="string">
            <text:p text:style-name="Table_20_Contents">modified</text:p>
          </table:table-cell>
          <table:table-cell table:style-name="Table1.A1" office:value-type="string">
            <text:p text:style-name="Table_20_Contents">2023-01-04</text:p>
          </table:table-cell>
          <table:table-cell table:style-name="Table1.A1" office:value-type="string">
            <text:p text:style-name="Table_20_Contents">2023-01-04 ✓</text:p>
          </table:table-cell>
        </table:table-row>
        <table:table-row>
          <table:table-cell table:style-name="Table1.A1" office:value-type="string">
            <text:p text:style-name="Table_20_Contents">tags</text:p>
          </table:table-cell>
          <table:table-cell table:style-name="Table1.A1" office:value-type="string">
            <text:p text:style-name="Table_20_Contents">mesmas 7 tags</text:p>
          </table:table-cell>
          <table:table-cell table:style-name="Table1.A1" office:value-type="string">
            <text:p text:style-name="Table_20_Contents">mesmas 7 tags ✓</text:p>
          </table:table-cell>
        </table:table-row>
        <table:table-row>
          <table:table-cell table:style-name="Table1.A1" office:value-type="string">
            <text:p text:style-name="Table_20_Contents">logsource</text:p>
          </table:table-cell>
          <table:table-cell table:style-name="Table1.A1" office:value-type="string">
            <text:p text:style-name="Table_20_Contents">product: cisco, service: aaa</text:p>
          </table:table-cell>
          <table:table-cell table:style-name="Table1.A1" office:value-type="string">
            <text:p text:style-name="Table_20_Contents">product: cisco, service: aaa ✓</text:p>
          </table:table-cell>
        </table:table-row>
        <table:table-row>
          <table:table-cell table:style-name="Table1.A1" office:value-type="string">
            <text:p text:style-name="Table_20_Contents">keywords</text:p>
          </table:table-cell>
          <table:table-cell table:style-name="Table1.A1" office:value-type="string">
            <text:p text:style-name="Table_20_Contents">mesmos 6 keywords</text:p>
          </table:table-cell>
          <table:table-cell table:style-name="Table1.A1" office:value-type="string">
            <text:p text:style-name="Table_20_Contents">mesmos 6 keywords ✓</text:p>
          </table:table-cell>
        </table:table-row>
        <table:table-row>
          <table:table-cell table:style-name="Table1.A1" office:value-type="string">
            <text:p text:style-name="Table_20_Contents">condition</text:p>
          </table:table-cell>
          <table:table-cell table:style-name="Table1.A1" office:value-type="string">
            <text:p text:style-name="Table_20_Contents"><text:span text:style-name="Source_20_Text">keywords</text:span></text:p>
          </table:table-cell>
          <table:table-cell table:style-name="Table1.A1" office:value-type="string">
            <text:p text:style-name="Table_20_Contents"><text:span text:style-name="Source_20_Text">all of keywords</text:span> ⚠️</text:p>
          </table:table-cell>
        </table:table-row>
        <table:table-row>
          <table:table-cell table:style-name="Table1.A1" office:value-type="string">
            <text:p text:style-name="Table_20_Contents">falsepositives</text:p>
          </table:table-cell>
          <table:table-cell table:style-name="Table1.A1" office:value-type="string">
            <text:p text:style-name="Table_20_Contents">Generally used to copy...</text:p>
          </table:table-cell>
          <table:table-cell table:style-name="Table1.A1" office:value-type="string">
            <text:p text:style-name="Table_20_Contents">Generally used to copy... ✓</text:p>
          </table:table-cell>
        </table:table-row>
        <table:table-row>
          <table:table-cell table:style-name="Table1.A1" office:value-type="string">
            <text:p text:style-name="Table_20_Contents">level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low 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d</text:span></text:p>
          </table:table-cell>
          <table:table-cell table:style-name="Table1.A1" office:value-type="string">
            <text:p text:style-name="Table_20_Contents">5e51acb2-...</text:p>
          </table:table-cell>
          <table:table-cell table:style-name="Table1.A1" office:value-type="string">
            <text:p text:style-name="Table_20_Contents"><text:span text:style-name="Strong_20_Emphasis">3aabb058-...</text:span> ✓</text:p>
          </table:table-cell>
        </table:table-row>
      </table:table>
      <text:p text:style-name="P4"><text:span text:style-name="Strong_20_Emphasis">A única coisa que o agente "gerou" foi:</text:span></text:p>
      <text:list text:style-name="L1">
        <text:list-item>
          <text:p text:style-name="P6"><text:span text:style-name="Strong_20_Emphasis">O UUID novo</text:span> — porque seu Nó 5 regenera o <text:span text:style-name="Source_20_Text">id:</text:span> automaticamente (lembra do bloco de correção automática de UUID?). Por isso o ID é o único campo realmente diferente. </text:p>
        </text:list-item>
        <text:list-item>
          <text:p text:style-name="P7"><text:span text:style-name="Strong_20_Emphasis">A </text:span><text:span text:style-name="Strong_20_Emphasis"><text:span text:style-name="Source_20_Text">condition:</text:span></text:span><text:span text:style-name="Strong_20_Emphasis"> levemente alterada</text:span> — de <text:span text:style-name="Source_20_Text">keywords</text:span> para <text:span text:style-name="Source_20_Text">all of keywords</text:span>. Pequena variação, possivelmente uma adaptação espontânea da LLM. </text:p>
        </text:list-item>
      </text:list>
      <text:p text:style-name="P4">Todo o resto é cópia carbono — autor, datas, descrição, palavras-chave, tudo. Até erros menores foram preservados (o "maybe" em vez de "may be" no description, por exemplo).</text:p>
      <text:h text:style-name="P1" text:outline-level="3">🔍 Como isso aconteceu</text:h>
      <text:p text:style-name="P4">O caminho do crime:</text:p>
      <text:list text:style-name="L2">
        <text:list-item>
          <text:p text:style-name="P8">Seu prompt provavelmente pediu algo sobre <text:span text:style-name="Strong_20_Emphasis">exfiltração em equipamentos Cisco</text:span>. </text:p>
        </text:list-item>
        <text:list-item>
          <text:p text:style-name="P8">O <text:span text:style-name="Strong_20_Emphasis">RAG</text:span> recuperou a regra <text:span text:style-name="Source_20_Text">cisco_cli_moving_data.yml</text:span> como top-1 (faz total sentido — é a regra mais relevante do banco para esse tema). </text:p>
        </text:list-item>
        <text:list-item>
          <text:p text:style-name="P8">A regra inteira foi para o <text:span text:style-name="Source_20_Text">contexto_rag</text:span> no prompt do Nó 4. </text:p>
        </text:list-item>
        <text:list-item>
          <text:p text:style-name="P9">O <text:span text:style-name="Source_20_Text">llama3.1</text:span>, recebendo uma regra exemplo que <text:span text:style-name="Strong_20_Emphasis">já casava perfeitamente</text:span> com o pedido, fez o que LLMs pequenos fazem quando têm exemplo bom demais: <text:span text:style-name="Strong_20_Emphasis">reproduziu</text:span> em vez de gerar. </text:p>
        </text:list-item>
      </text:list>
      <text:h text:style-name="P1" text:outline-level="3">🤔 Isso é ruim ou bom?</text:h>
      <text:p text:style-name="P4">Depende do ângulo:</text:p>
      <text:p text:style-name="P4"><text:span text:style-name="Strong_20_Emphasis">Para detecção:</text:span> a regra é <text:span text:style-name="Strong_20_Emphasis">funcional</text:span>. Vai detectar exatamente o que devia detectar. Não há nada errado tecnicamente nela.</text:p>
      <text:p text:style-name="P4"><text:soft-page-break/><text:span text:style-name="Strong_20_Emphasis">Para você defender o TCC:</text:span> é um problema sério de avaliação. Se um avaliador comparar essa regra com o banco do SigmaHQ e ver que é cópia, vai perguntar <text:span text:style-name="Emphasis">"qual o valor agregado do seu agente?"</text:span>. A resposta não pode ser "regenerar UUIDs".</text:p>
      <text:h text:style-name="P1" text:outline-level="3">🎓 Por que isso é, na verdade, um achado experimental valioso</text:h>
      <text:p text:style-name="P4">Esse é o lado positivo: você <text:span text:style-name="Strong_20_Emphasis">descobriu</text:span> um comportamento real e documentável do RAG. Ele tem dois modos:</text:p>
      <text:p text:style-name="P4"><text:span text:style-name="Strong_20_Emphasis">Modo "inspiração":</text:span> o RAG traz exemplos parecidos mas distintos → LLM sintetiza algo novo (foi o que aconteceu com o PrintNightmare).</text:p>
      <text:p text:style-name="P4"><text:span text:style-name="Strong_20_Emphasis">Modo "cópia":</text:span> o RAG traz uma regra que <text:span text:style-name="Strong_20_Emphasis">casa perfeitamente</text:span> → LLM transcreve com pequenas variações (esse caso).</text:p>
      <text:p text:style-name="P4">O que define em qual modo o agente entra é a <text:span text:style-name="Strong_20_Emphasis">similaridade entre o pedido e a melhor regra do banco</text:span>. Quando a similaridade é altíssima, o gerador degrada para um quase-extrator.</text:p>
      <text:p text:style-name="P4">Isso é um achado <text:span text:style-name="Strong_20_Emphasis">publicável</text:span>. Você pode discutir na monografia:</text:p>
      <text:p text:style-name="P3"><text:span text:style-name="Emphasis">"Observou-se que, quando o banco RAG contém uma regra altamente similar ao pedido do usuário (cosseno &gt; limiar X), o agente tende a reproduzir essa regra com pequenas variações em vez de sintetizar uma nova. Este comportamento, denominado 'colapso para extração', constitui uma limitação dos modelos pequenos quando expostos a exemplos quase-redundantes em few-shot prompting."</text:span></text:p>
      <text:h text:style-name="P1" text:outline-level="3">🛠️ Mitigações possíveis (mas não obrigatórias antes da defesa)</text:h>
      <text:list text:style-name="L3">
        <text:list-item>
          <text:p text:style-name="P10"><text:span text:style-name="Strong_20_Emphasis">Detectar similaridade alta na saída.</text:span> Comparar a regra gerada com cada regra do RAG; se similaridade &gt; 90%, sinalizar como "cópia" no relatório de avaliação. </text:p>
        </text:list-item>
        <text:list-item>
          <text:p text:style-name="P10"><text:span text:style-name="Strong_20_Emphasis">Aumentar a </text:span><text:span text:style-name="Strong_20_Emphasis"><text:span text:style-name="Source_20_Text">temperature</text:span></text:span> do LLM em casos de alta similaridade do RAG — força a LLM a criar mais. Risco: piora a qualidade em geral. </text:p>
        </text:list-item>
        <text:list-item>
          <text:p text:style-name="P10"><text:span text:style-name="Strong_20_Emphasis">Filtrar o top-1 quando ele é muito similar.</text:span> Se o score do re-ranker no top-1 for &gt; X, descarta esse exemplar e usa do 2 ao 6. Força a LLM a não copiar. </text:p>
        </text:list-item>
        <text:list-item>
          <text:p text:style-name="P11"><text:span text:style-name="Strong_20_Emphasis">Não fazer nada, e reconhecer na monografia.</text:span> Aceitar como limitação e propor como trabalho futuro. </text:p>
        </text:list-item>
      </text:list>
      <text:p text:style-name="P4">Honestamente, recomendo a opção 4 + a opção 1 só como métrica de avaliação. Aceita o comportamento, <text:span text:style-name="Strong_20_Emphasis">mede</text:span> quando ele acontece (qual % das suas 50 regras são "cópias" vs. "sínteses"), e usa isso como dado da avaliação.</text:p>
      <text:h text:style-name="P1" text:outline-level="3">❓ Quer fazer um experimento rápido?</text:h>
      <text:p text:style-name="P4">Pra confirmar o diagnóstico do "colapso para extração", rode o mesmo prompt do Cisco mas com uma variação que <text:span text:style-name="Strong_20_Emphasis">não case</text:span> com nenhuma regra do banco. Por exemplo, em vez de "exfiltração em Cisco IOS", pede algo como <text:span text:style-name="Emphasis">"detectar exfiltração de configurações em equipamentos Cisco ASA via FTP outbound em logs syslog"</text:span> — mais específico, menos provável de ter match exato no SigmaHQ.</text:p>
      <text:p text:style-name="P4">Se o agente conseguir <text:span text:style-name="Strong_20_Emphasis">sintetizar</text:span> uma regra nova nesse caso, confirma a hipótese: o problema não é o agente, é a sobreposição com o banco.</text:p>
      <text:p text:style-name="P4"><text:soft-page-break/>Mas isso é experimento para curiosidade. Para o TCC, registra o achado e segue para os 50 prompts da avaliação.</text:p>
      <text:p text:style-name="Standard"/>
      <text:p text:style-name="Standard"/>
      <text:p text:style-name="Standard"/>
      <text:p text:style-name="Text_20_body">Aqui está o detetive trabalhando. Vamos resolver isso.</text:p>
      <text:h text:style-name="Heading_20_2" text:outline-level="2">🎯 Resposta direta à sua dúvida</text:h>
      <text:p text:style-name="Text_20_body"><text:span text:style-name="Strong_20_Emphasis">"Mas eu não treinei o modelo..."</text:span> — você está certa, e isso é o ponto crucial. Deixa eu explicar a confusão de termos.</text:p>
      <text:p text:style-name="Text_20_body">Você não treinou o <text:span text:style-name="Source_20_Text">llama3.1</text:span>. <text:span text:style-name="Strong_20_Emphasis">A Meta treinou</text:span>, e o disponibilizou para você baixar via Ollama. O treino consumiu <text:span text:style-name="Strong_20_Emphasis">trilhões</text:span> de tokens da internet pública. Entre esses tokens estavam, quase com certeza, <text:span text:style-name="Strong_20_Emphasis">as regras públicas do SigmaHQ no GitHub</text:span>.</text:p>
      <text:p text:style-name="Text_20_body">Quando uma LLM é treinada com texto da internet, ela não "memoriza" no sentido humano, mas <text:span text:style-name="Strong_20_Emphasis">certos padrões textuais ficam fortemente impressos</text:span> nos pesos da rede. Regras curtas, simples e altamente padronizadas — como essa do Cisco — são justamente o tipo de conteúdo que tende a ser reproduzido quase literalmente quando o modelo encontra um pedido suficientemente parecido.</text:p>
      <text:h text:style-name="Heading_20_2" text:outline-level="2">🔬 As evidências do caso</text:h>
      <text:p text:style-name="Text_20_body">Agora juntando tudo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rificação</text:p>
            </table:table-cell>
            <table:table-cell table:style-name="Table2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.A1" office:value-type="string">
            <text:p text:style-name="Table_20_Contents">ChromaDB tem essa regra?</text:p>
          </table:table-cell>
          <table:table-cell table:style-name="Table2.A1" office:value-type="string">
            <text:p text:style-name="Table_20_Contents">❌ Não está</text:p>
          </table:table-cell>
        </table:table-row>
        <table:table-row>
          <table:table-cell table:style-name="Table2.A1" office:value-type="string">
            <text:p text:style-name="Table_20_Contents">Prompt tinha URL do SigmaHQ?</text:p>
          </table:table-cell>
          <table:table-cell table:style-name="Table2.A1" office:value-type="string">
            <text:p text:style-name="Table_20_Contents">❌ Diz "(none provided in the original rule)"</text:p>
          </table:table-cell>
        </table:table-row>
        <table:table-row>
          <table:table-cell table:style-name="Table2.A1" office:value-type="string">
            <text:p text:style-name="Table_20_Contents">DuckDuckGo trouxe a regra?</text:p>
          </table:table-cell>
          <table:table-cell table:style-name="Table2.A1" office:value-type="string">
            <text:p text:style-name="Table_20_Contents">⚠️ A confirmar (você não mandou o output)</text:p>
          </table:table-cell>
        </table:table-row>
        <table:table-row>
          <table:table-cell table:style-name="Table2.A1" office:value-type="string">
            <text:p text:style-name="Table_20_Contents">O modelo poderia ter "decorado" no treino?</text:p>
          </table:table-cell>
          <table:table-cell table:style-name="Table2.A1" office:value-type="string">
            <text:p text:style-name="Table_20_Contents">✅ Sim, é literatura conhecida</text:p>
          </table:table-cell>
        </table:table-row>
      </table:table>
      <text:p text:style-name="Text_20_body"><text:span text:style-name="Strong_20_Emphasis">E há uma pista que me chama muito a atenção no seu prompt:</text:span></text:p>
      <text:p text:style-name="Preformatted_20_Text"><text:span text:style-name="Source_20_Text"># References</text:span></text:p>
      <text:p text:style-name="P5"><text:span text:style-name="Source_20_Text">(none provided in the original rule)</text:span></text:p>
      <text:p text:style-name="Text_20_body">A frase <text:span text:style-name="Strong_20_Emphasis">"in the original rule"</text:span> ("na regra original") <text:span text:style-name="Strong_20_Emphasis">denuncia</text:span> que esse prompt foi construído <text:span text:style-name="Strong_20_Emphasis">a partir de uma regra que já existia</text:span>. Quem fez esse prompt sabia que uma regra original existia (do Cisco no SigmaHQ) e mencionou que ela não tinha referências. Não foi um pedido "novo" — foi uma engenharia reversa de algo que já estava no SigmaHQ.</text:p>
      <text:p text:style-name="Text_20_body">Isso muda o experimento inteiro. Você não pediu para o agente <text:span text:style-name="Strong_20_Emphasis">criar</text:span> uma regra; você pediu para ele <text:span text:style-name="Strong_20_Emphasis">reconstruir</text:span> uma regra que existe. E ele fez exatamente isso, provavelmente puxando da memória do modelo + algum reforço do DuckDuckGo.</text:p>
      <text:h text:style-name="Heading_20_2" text:outline-level="2">🤔 Então o que aconteceu de fato?</text:h>
      <text:p text:style-name="Text_20_body">Hipótese mais provável, em ordem:</text:p>
      <text:list text:style-name="L4">
        <text:list-item>
          <text:p text:style-name="P12"><text:span text:style-name="Strong_20_Emphasis">A LLM reconheceu o padrão.</text:span> "Cisco IOS, AAA logs, file transfer, TFTP/RCP/copy" → uma regra clássica e amplamente publicada. O modelo "se lembrou" durante a geração.</text:p>
        </text:list-item>
        <text:list-item>
          <text:p text:style-name="P12"><text:soft-page-break/><text:span text:style-name="Strong_20_Emphasis">DuckDuckGo possivelmente confirmou.</text:span> Se a busca pelo termo trouxe um snippet com a regra (ou parte dela), reforçou o caminho de geração.</text:p>
        </text:list-item>
        <text:list-item>
          <text:p text:style-name="P12"><text:span text:style-name="Strong_20_Emphasis">O prompt foi excessivamente específico.</text:span> Ele descreve <text:span text:style-name="Strong_20_Emphasis">exatamente</text:span> o conteúdo da regra original — protocolos, palavras-chave, estrutura. A LLM tinha muito pouco espaço para "inventar"; o pedido era essencialmente uma especificação fiel da regra existente.</text:p>
        </text:list-item>
      </text:list>
      <text:h text:style-name="Heading_20_2" text:outline-level="2">🎓 Implicações para sua monografia</text:h>
      <text:p text:style-name="Text_20_body">Esse achado é, na verdade, <text:span text:style-name="Strong_20_Emphasis">uma das contribuições mais ricas que você pode fazer</text:span>. Você descobriu três fenômenos sobrepostos:</text:p>
      <text:p text:style-name="Text_20_body"><text:span text:style-name="Strong_20_Emphasis">1. Memorização de modelo (training data leakage).</text:span> Existe literatura abundante sobre isso — modelos LLM reproduzem trechos do treino, e regras Sigma são candidatas óbvias por serem conteúdo público, padronizado e indexado pelo Google. Você pode citar: Carlini et al. (2021) "Extracting Training Data from Large Language Models".</text:p>
      <text:p text:style-name="Text_20_body"><text:span text:style-name="Strong_20_Emphasis">2. Especificidade do prompt como variável.</text:span> Prompts muito específicos restringem o espaço de geração ao ponto de convergir para uma única saída plausível. Isso vira <text:span text:style-name="Strong_20_Emphasis">eixo de análise</text:span>: comparar prompts vagos vs. específicos e medir taxa de "regeneração" vs. "criação".</text:p>
      <text:p text:style-name="Text_20_body"><text:span text:style-name="Strong_20_Emphasis">3. Contaminação web via DuckDuckGo.</text:span> Independente da memorização, a busca pode ter trazido o texto literal. Vale verificar.</text:p>
      <text:h text:style-name="Heading_20_2" text:outline-level="2">🛠️ O que recomendo agora</text:h>
      <text:p text:style-name="Text_20_body"><text:span text:style-name="Strong_20_Emphasis">Antes de tudo:</text:span> me manda o output completo do terminal dessa execução do Cisco. Quero ver se o DuckDuckGo trouxe resultado e o que ele trouxe. Sem isso, não dá pra separar a hipótese de memorização da hipótese de busca web.</text:p>
      <text:p text:style-name="Text_20_body"><text:span text:style-name="Strong_20_Emphasis">Em paralelo, dois experimentos rápidos</text:span> que valeriam ouro para a monografia:</text:p>
      <text:p text:style-name="Text_20_body"><text:span text:style-name="Strong_20_Emphasis">Experimento A</text:span> — gera a regra do Cisco com o <text:span text:style-name="Strong_20_Emphasis">DuckDuckGo desabilitado</text:span>:</text:p>
      <text:p text:style-name="Preformatted_20_Text"><text:span text:style-name="Source_20_Text"># no Nó 3, comenta temporariamente:</text:span></text:p>
      <text:p text:style-name="P5"><text:span text:style-name="Source_20_Text"># resultado_web = busca_duckduckgo(termo_busca_web, max_resultados=5)</text:span></text:p>
      <text:p text:style-name="Text_20_body">Se ainda assim ela vier idêntica, é memorização do modelo. Se vier diferente, foi o DDG.</text:p>
      <text:p text:style-name="Text_20_body"><text:span text:style-name="Strong_20_Emphasis">Experimento B</text:span> — reformula o prompt para ser <text:span text:style-name="Strong_20_Emphasis">menos específico</text:span>. Por exemplo:</text:p>
      <text:p text:style-name="Quotations">"Detect suspicious file transfers on Cisco devices that might indicate data exfiltration."</text:p>
      <text:p text:style-name="Text_20_body">Se ainda assim vier a regra exata do Austin Clark, é memorização forte. Se vier algo diferente, mostra que o prompt específico foi o gatilho.</text:p>
      <text:h text:style-name="Heading_20_2" text:outline-level="2">💡 E sobre "instruir o agente a não consultar o SigmaHQ"</text:h>
      <text:p text:style-name="Text_20_body">Voltando à sua pergunta original: <text:span text:style-name="Strong_20_Emphasis">não dá para impedir o </text:span><text:span text:style-name="Strong_20_Emphasis"><text:span text:style-name="Source_20_Text">llama3.1</text:span></text:span><text:span text:style-name="Strong_20_Emphasis"> de "lembrar" do que viu no treino</text:span>. Os pesos da rede já contêm aquele conhecimento, e nenhum prompt vai apagá-lo. O que dá para fazer:</text:p>
      <text:list text:style-name="L5">
        <text:list-item>
          <text:p text:style-name="P14"><text:soft-page-break/><text:span text:style-name="Strong_20_Emphasis">Bloquear o DuckDuckGo de retornar resultados de domínios Sigma</text:span> (filtro fácil que sugeri antes) </text:p>
        </text:list-item>
        <text:list-item>
          <text:p text:style-name="P14"><text:span text:style-name="Strong_20_Emphasis">Filtrar URLs Sigma</text:span> que o usuário coloque no prompt </text:p>
        </text:list-item>
        <text:list-item>
          <text:p text:style-name="P13"><text:span text:style-name="Strong_20_Emphasis">Detectar e medir</text:span> a similaridade entre regra gerada e regras conhecidas (métrica de avaliação) </text:p>
        </text:list-item>
      </text:list>
      <text:p text:style-name="Text_20_body">Mas a memorização do modelo é uma <text:span text:style-name="Strong_20_Emphasis">propriedade fundamental</text:span> do <text:span text:style-name="Source_20_Text">llama3.1</text:span>. Não vai sair com instrução de prompt. Você só pode <text:span text:style-name="Strong_20_Emphasis">medir e relatar</text:span>.</text:p>
      <text:p text:style-name="Text_20_body">Roda o experimento A (desligar DDG e gerar de novo) e me manda o output. Aí fechamos o diagnóstico com evidência empírica de qual hipótese é a vencedor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7:55:23.005817263</meta:creation-date>
    <dc:date>2026-06-10T18:15:11.809921626</dc:date>
    <meta:editing-duration>PT34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5" meta:paragraph-count="123" meta:word-count="1601" meta:character-count="9586" meta:non-whitespace-character-count="8096"/>
  </office:meta>
</office:document-meta>
</file>